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6.1595cm" style:use-optimal-column-width="true"/>
    </style:style>
    <style:style style:name="co2" style:family="table-column">
      <style:table-column-properties fo:break-before="auto" style:column-width="2.7305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3.66183333333333cm" style:use-optimal-column-width="true"/>
    </style:style>
    <style:style style:name="co5" style:family="table-column">
      <style:table-column-properties fo:break-before="auto" style:column-width="2.83633333333333cm" style:use-optimal-column-width="true"/>
    </style:style>
    <style:style style:name="co6" style:family="table-column">
      <style:table-column-properties fo:break-before="auto" style:column-width="1.98966666666667cm" style:use-optimal-column-width="true"/>
    </style:style>
    <style:style style:name="co7" style:family="table-column">
      <style:table-column-properties fo:break-before="auto" style:column-width="4.0851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ea Name</text:p>
          </table:table-cell>
          <table:table-cell office:value-type="string" table:style-name="ce2">
            <text:p>Self_Harm_Rate</text:p>
          </table:table-cell>
          <table:table-cell office:value-type="string" table:style-name="ce2">
            <text:p>MH_Rate</text:p>
          </table:table-cell>
          <table:table-cell office:value-type="string" table:style-name="ce2">
            <text:p>School_Absence_Rate</text:p>
          </table:table-cell>
          <table:table-cell office:value-type="string" table:style-name="ce2">
            <text:p>IMD_Score_Rate</text:p>
          </table:table-cell>
          <table:table-cell office:value-type="string" table:style-name="ce2">
            <text:p>IMD_Group</text:p>
          </table:table-cell>
          <table:table-cell office:value-type="string" table:style-name="ce2">
            <text:p>Prevention Priority Scor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rafford</text:p>
          </table:table-cell>
          <table:table-cell office:value-type="float" office:value="206.16936250000001" table:style-name="ce2">
            <text:p>206.1693625</text:p>
          </table:table-cell>
          <table:table-cell office:value-type="float" office:value="44.63090244" table:style-name="ce2">
            <text:p>44.63090244</text:p>
          </table:table-cell>
          <table:table-cell office:value-type="float" office:value="17.699619999999999" table:style-name="ce2">
            <text:p>17.69962</text:p>
          </table:table-cell>
          <table:table-cell office:value-type="float" office:value="16.088000000000001" table:style-name="ce2">
            <text:p>16.088</text:p>
          </table:table-cell>
          <table:table-cell office:value-type="string" table:style-name="ce2">
            <text:p>Medium</text:p>
          </table:table-cell>
          <table:table-cell office:value-type="float" office:value="9.2015247038544992" table:style-name="ce2">
            <text:p>9.20152470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wer Hamlets</text:p>
          </table:table-cell>
          <table:table-cell office:value-type="float" office:value="116.2152407" table:style-name="ce2">
            <text:p>116.2152407</text:p>
          </table:table-cell>
          <table:table-cell office:value-type="float" office:value="87.098357800000002" table:style-name="ce2">
            <text:p>87.0983578</text:p>
          </table:table-cell>
          <table:table-cell office:value-type="float" office:value="17.954910000000002" table:style-name="ce2">
            <text:p>17.95491</text:p>
          </table:table-cell>
          <table:table-cell office:value-type="float" office:value="27.913" table:style-name="ce2">
            <text:p>27.913</text:p>
          </table:table-cell>
          <table:table-cell office:value-type="string" table:style-name="ce2">
            <text:p>High</text:p>
          </table:table-cell>
          <table:table-cell office:value-type="float" office:value="10.1221566163017" table:style-name="ce2">
            <text:p>10.1221566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tton</text:p>
          </table:table-cell>
          <table:table-cell office:value-type="float" office:value="183.444006" table:style-name="ce2">
            <text:p>183.444006</text:p>
          </table:table-cell>
          <table:table-cell office:value-type="float" office:value="59.91731411" table:style-name="ce2">
            <text:p>59.91731411</text:p>
          </table:table-cell>
          <table:table-cell office:value-type="float" office:value="18.281549999999999" table:style-name="ce2">
            <text:p>18.28155</text:p>
          </table:table-cell>
          <table:table-cell office:value-type="float" office:value="13.987" table:style-name="ce2">
            <text:p>13.987</text:p>
          </table:table-cell>
          <table:table-cell office:value-type="string" table:style-name="ce2">
            <text:p>Medium</text:p>
          </table:table-cell>
          <table:table-cell office:value-type="float" office:value="10.9914721290987" table:style-name="ce2">
            <text:p>10.9914721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ston upon Thames</text:p>
          </table:table-cell>
          <table:table-cell office:value-type="float" office:value="153.90743889999999" table:style-name="ce2">
            <text:p>153.9074389</text:p>
          </table:table-cell>
          <table:table-cell office:value-type="float" office:value="95.851020129999995" table:style-name="ce2">
            <text:p>95.85102013</text:p>
          </table:table-cell>
          <table:table-cell office:value-type="float" office:value="18.52535" table:style-name="ce2">
            <text:p>18.52535</text:p>
          </table:table-cell>
          <table:table-cell office:value-type="float" office:value="11.381" table:style-name="ce2">
            <text:p>11.381</text:p>
          </table:table-cell>
          <table:table-cell office:value-type="string" table:style-name="ce2">
            <text:p>Medium</text:p>
          </table:table-cell>
          <table:table-cell office:value-type="float" office:value="14.7521850241606" table:style-name="ce2">
            <text:p>14.7521850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dbridge</text:p>
          </table:table-cell>
          <table:table-cell office:value-type="float" office:value="92.945248989999996" table:style-name="ce2">
            <text:p>92.94524899</text:p>
          </table:table-cell>
          <table:table-cell office:value-type="float" office:value="51.836972719999999" table:style-name="ce2">
            <text:p>51.83697272</text:p>
          </table:table-cell>
          <table:table-cell office:value-type="float" office:value="18.658339999999999" table:style-name="ce2">
            <text:p>18.65834</text:p>
          </table:table-cell>
          <table:table-cell office:value-type="float" office:value="17.202999999999999" table:style-name="ce2">
            <text:p>17.203</text:p>
          </table:table-cell>
          <table:table-cell office:value-type="string" table:style-name="ce2">
            <text:p>Medium</text:p>
          </table:table-cell>
          <table:table-cell office:value-type="float" office:value="4.8180003363482404" table:style-name="ce2">
            <text:p>4.81800033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ichmond upon Thames</text:p>
          </table:table-cell>
          <table:table-cell office:value-type="float" office:value="194.71409399999999" table:style-name="ce2">
            <text:p>194.714094</text:p>
          </table:table-cell>
          <table:table-cell office:value-type="float" office:value="68.264045330000002" table:style-name="ce2">
            <text:p>68.26404533</text:p>
          </table:table-cell>
          <table:table-cell office:value-type="float" office:value="18.86599" table:style-name="ce2">
            <text:p>18.86599</text:p>
          </table:table-cell>
          <table:table-cell office:value-type="float" office:value="9.4250000000000007" table:style-name="ce2">
            <text:p>9.425</text:p>
          </table:table-cell>
          <table:table-cell office:value-type="string" table:style-name="ce2">
            <text:p>Low</text:p>
          </table:table-cell>
          <table:table-cell office:value-type="float" office:value="13.2919717392059" table:style-name="ce2">
            <text:p>13.2919717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uthwark</text:p>
          </table:table-cell>
          <table:table-cell office:value-type="float" office:value="106.4839731" table:style-name="ce2">
            <text:p>106.4839731</text:p>
          </table:table-cell>
          <table:table-cell office:value-type="float" office:value="26.542095759999999" table:style-name="ce2">
            <text:p>26.54209576</text:p>
          </table:table-cell>
          <table:table-cell office:value-type="float" office:value="19.057950000000002" table:style-name="ce2">
            <text:p>19.05795</text:p>
          </table:table-cell>
          <table:table-cell office:value-type="float" office:value="25.811" table:style-name="ce2">
            <text:p>25.811</text:p>
          </table:table-cell>
          <table:table-cell office:value-type="string" table:style-name="ce2">
            <text:p>High</text:p>
          </table:table-cell>
          <table:table-cell office:value-type="float" office:value="2.82630781092546" table:style-name="ce2">
            <text:p>2.82630781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ndsworth</text:p>
          </table:table-cell>
          <table:table-cell office:value-type="float" office:value="125.7885022" table:style-name="ce2">
            <text:p>125.7885022</text:p>
          </table:table-cell>
          <table:table-cell office:value-type="float" office:value="68.561242329999999" table:style-name="ce2">
            <text:p>68.56124233</text:p>
          </table:table-cell>
          <table:table-cell office:value-type="float" office:value="19.18347" table:style-name="ce2">
            <text:p>19.18347</text:p>
          </table:table-cell>
          <table:table-cell office:value-type="float" office:value="16.611000000000001" table:style-name="ce2">
            <text:p>16.611</text:p>
          </table:table-cell>
          <table:table-cell office:value-type="string" table:style-name="ce2">
            <text:p>Medium</text:p>
          </table:table-cell>
          <table:table-cell office:value-type="float" office:value="8.6242159816619406" table:style-name="ce2">
            <text:p>8.62421598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erton</text:p>
          </table:table-cell>
          <table:table-cell office:value-type="float" office:value="151.61880540000001" table:style-name="ce2">
            <text:p>151.6188054</text:p>
          </table:table-cell>
          <table:table-cell office:value-type="float" office:value="53.105616449999999" table:style-name="ce2">
            <text:p>53.10561645</text:p>
          </table:table-cell>
          <table:table-cell office:value-type="float" office:value="19.273" table:style-name="ce2">
            <text:p>19.273</text:p>
          </table:table-cell>
          <table:table-cell office:value-type="float" office:value="14.648999999999999" table:style-name="ce2">
            <text:p>14.649</text:p>
          </table:table-cell>
          <table:table-cell office:value-type="string" table:style-name="ce2">
            <text:p>Medium</text:p>
          </table:table-cell>
          <table:table-cell office:value-type="float" office:value="8.0518101261795891" table:style-name="ce2">
            <text:p>8.0518101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aling</text:p>
          </table:table-cell>
          <table:table-cell office:value-type="float" office:value="124.68081549999999" table:style-name="ce2">
            <text:p>124.6808155</text:p>
          </table:table-cell>
          <table:table-cell office:value-type="float" office:value="43.094956660000001" table:style-name="ce2">
            <text:p>43.09495666</text:p>
          </table:table-cell>
          <table:table-cell office:value-type="float" office:value="19.894279999999998" table:style-name="ce2">
            <text:p>19.89428</text:p>
          </table:table-cell>
          <table:table-cell office:value-type="float" office:value="22.71" table:style-name="ce2">
            <text:p>22.71</text:p>
          </table:table-cell>
          <table:table-cell office:value-type="string" table:style-name="ce2">
            <text:p>High</text:p>
          </table:table-cell>
          <table:table-cell office:value-type="float" office:value="5.3731143403059596" table:style-name="ce2">
            <text:p>5.373114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rnet</text:p>
          </table:table-cell>
          <table:table-cell office:value-type="float" office:value="174.06557359999999" table:style-name="ce2">
            <text:p>174.0655736</text:p>
          </table:table-cell>
          <table:table-cell office:value-type="float" office:value="81.329024700000005" table:style-name="ce2">
            <text:p>81.3290247</text:p>
          </table:table-cell>
          <table:table-cell office:value-type="float" office:value="20.359349999999999" table:style-name="ce2">
            <text:p>20.35935</text:p>
          </table:table-cell>
          <table:table-cell office:value-type="float" office:value="16.148" table:style-name="ce2">
            <text:p>16.148</text:p>
          </table:table-cell>
          <table:table-cell office:value-type="string" table:style-name="ce2">
            <text:p>Medium</text:p>
          </table:table-cell>
          <table:table-cell office:value-type="float" office:value="14.156583334734099" table:style-name="ce2">
            <text:p>14.1565833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vering</text:p>
          </table:table-cell>
          <table:table-cell office:value-type="float" office:value="170.87327959999999" table:style-name="ce2">
            <text:p>170.8732796</text:p>
          </table:table-cell>
          <table:table-cell office:value-type="float" office:value="97.887266499999996" table:style-name="ce2">
            <text:p>97.8872665</text:p>
          </table:table-cell>
          <table:table-cell office:value-type="float" office:value="20.392910000000001" table:style-name="ce2">
            <text:p>20.39291</text:p>
          </table:table-cell>
          <table:table-cell office:value-type="float" office:value="16.789000000000001" table:style-name="ce2">
            <text:p>16.789</text:p>
          </table:table-cell>
          <table:table-cell office:value-type="string" table:style-name="ce2">
            <text:p>Medium</text:p>
          </table:table-cell>
          <table:table-cell office:value-type="float" office:value="16.726318257934199" table:style-name="ce2">
            <text:p>16.726318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uthend-on-Sea</text:p>
          </table:table-cell>
          <table:table-cell office:value-type="float" office:value="259.036677" table:style-name="ce2">
            <text:p>259.036677</text:p>
          </table:table-cell>
          <table:table-cell office:value-type="float" office:value="103.31912699999999" table:style-name="ce2">
            <text:p>103.319127</text:p>
          </table:table-cell>
          <table:table-cell office:value-type="float" office:value="20.53199" table:style-name="ce2">
            <text:p>20.53199</text:p>
          </table:table-cell>
          <table:table-cell office:value-type="float" office:value="22.375" table:style-name="ce2">
            <text:p>22.375</text:p>
          </table:table-cell>
          <table:table-cell office:value-type="string" table:style-name="ce2">
            <text:p>High</text:p>
          </table:table-cell>
          <table:table-cell office:value-type="float" office:value="26.763443328621001" table:style-name="ce2">
            <text:p>26.7634433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okingham</text:p>
          </table:table-cell>
          <table:table-cell office:value-type="float" office:value="134.0030184" table:style-name="ce2">
            <text:p>134.0030184</text:p>
          </table:table-cell>
          <table:table-cell office:value-type="float" office:value="46.174447059999999" table:style-name="ce2">
            <text:p>46.17444706</text:p>
          </table:table-cell>
          <table:table-cell office:value-type="float" office:value="20.814990000000002" table:style-name="ce2">
            <text:p>20.81499</text:p>
          </table:table-cell>
          <table:table-cell office:value-type="float" office:value="5.8460000000000001" table:style-name="ce2">
            <text:p>5.846</text:p>
          </table:table-cell>
          <table:table-cell office:value-type="string" table:style-name="ce2">
            <text:p>Low</text:p>
          </table:table-cell>
          <table:table-cell office:value-type="float" office:value="6.1875152789910102" table:style-name="ce2">
            <text:p>6.18751527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rking and Dagenham</text:p>
          </table:table-cell>
          <table:table-cell office:value-type="float" office:value="116.0565878" table:style-name="ce2">
            <text:p>116.0565878</text:p>
          </table:table-cell>
          <table:table-cell office:value-type="float" office:value="54.397662449999999" table:style-name="ce2">
            <text:p>54.39766245</text:p>
          </table:table-cell>
          <table:table-cell office:value-type="float" office:value="20.901900000000001" table:style-name="ce2">
            <text:p>20.9019</text:p>
          </table:table-cell>
          <table:table-cell office:value-type="float" office:value="32.768000000000001" table:style-name="ce2">
            <text:p>32.768</text:p>
          </table:table-cell>
          <table:table-cell office:value-type="string" table:style-name="ce2">
            <text:p>High</text:p>
          </table:table-cell>
          <table:table-cell office:value-type="float" office:value="6.3132070882431899" table:style-name="ce2">
            <text:p>6.3132070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ewham</text:p>
          </table:table-cell>
          <table:table-cell office:value-type="float" office:value="76.08528785" table:style-name="ce2">
            <text:p>76.08528785</text:p>
          </table:table-cell>
          <table:table-cell office:value-type="float" office:value="71.884696950000006" table:style-name="ce2">
            <text:p>71.88469695</text:p>
          </table:table-cell>
          <table:table-cell office:value-type="float" office:value="21.014800000000001" table:style-name="ce2">
            <text:p>21.0148</text:p>
          </table:table-cell>
          <table:table-cell office:value-type="float" office:value="29.577000000000002" table:style-name="ce2">
            <text:p>29.577</text:p>
          </table:table-cell>
          <table:table-cell office:value-type="string" table:style-name="ce2">
            <text:p>High</text:p>
          </table:table-cell>
          <table:table-cell office:value-type="float" office:value="5.4693678594507702" table:style-name="ce2">
            <text:p>5.46936785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ounslow</text:p>
          </table:table-cell>
          <table:table-cell office:value-type="float" office:value="142.8522882" table:style-name="ce2">
            <text:p>142.8522882</text:p>
          </table:table-cell>
          <table:table-cell office:value-type="float" office:value="29.503746979999999" table:style-name="ce2">
            <text:p>29.50374698</text:p>
          </table:table-cell>
          <table:table-cell office:value-type="float" office:value="21.251049999999999" table:style-name="ce2">
            <text:p>21.25105</text:p>
          </table:table-cell>
          <table:table-cell office:value-type="float" office:value="21.486999999999998" table:style-name="ce2">
            <text:p>21.487</text:p>
          </table:table-cell>
          <table:table-cell office:value-type="string" table:style-name="ce2">
            <text:p>High</text:p>
          </table:table-cell>
          <table:table-cell office:value-type="float" office:value="4.2146777665668402" table:style-name="ce2">
            <text:p>4.21467776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lough</text:p>
          </table:table-cell>
          <table:table-cell office:value-type="float" office:value="152.44548900000001" table:style-name="ce2">
            <text:p>152.445489</text:p>
          </table:table-cell>
          <table:table-cell office:value-type="float" office:value="22.297041180000001" table:style-name="ce2">
            <text:p>22.29704118</text:p>
          </table:table-cell>
          <table:table-cell office:value-type="float" office:value="21.411850000000001" table:style-name="ce2">
            <text:p>21.41185</text:p>
          </table:table-cell>
          <table:table-cell office:value-type="float" office:value="22.965" table:style-name="ce2">
            <text:p>22.965</text:p>
          </table:table-cell>
          <table:table-cell office:value-type="string" table:style-name="ce2">
            <text:p>High</text:p>
          </table:table-cell>
          <table:table-cell office:value-type="float" office:value="3.3990833459382399" table:style-name="ce2">
            <text:p>3.39908334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ent</text:p>
          </table:table-cell>
          <table:table-cell office:value-type="float" office:value="166.42207020000001" table:style-name="ce2">
            <text:p>166.4220702</text:p>
          </table:table-cell>
          <table:table-cell office:value-type="float" office:value="81.295305200000001" table:style-name="ce2">
            <text:p>81.2953052</text:p>
          </table:table-cell>
          <table:table-cell office:value-type="float" office:value="21.466550000000002" table:style-name="ce2">
            <text:p>21.46655</text:p>
          </table:table-cell>
          <table:table-cell office:value-type="float" office:value="25.558" table:style-name="ce2">
            <text:p>25.558</text:p>
          </table:table-cell>
          <table:table-cell office:value-type="string" table:style-name="ce2">
            <text:p>High</text:p>
          </table:table-cell>
          <table:table-cell office:value-type="float" office:value="13.5293329889248" table:style-name="ce2">
            <text:p>13.529332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ewisham</text:p>
          </table:table-cell>
          <table:table-cell office:value-type="float" office:value="108.4690403" table:style-name="ce2">
            <text:p>108.4690403</text:p>
          </table:table-cell>
          <table:table-cell office:value-type="float" office:value="48.320850450000002" table:style-name="ce2">
            <text:p>48.32085045</text:p>
          </table:table-cell>
          <table:table-cell office:value-type="float" office:value="21.494800000000001" table:style-name="ce2">
            <text:p>21.4948</text:p>
          </table:table-cell>
          <table:table-cell office:value-type="float" office:value="26.661000000000001" table:style-name="ce2">
            <text:p>26.661</text:p>
          </table:table-cell>
          <table:table-cell office:value-type="string" table:style-name="ce2">
            <text:p>High</text:p>
          </table:table-cell>
          <table:table-cell office:value-type="float" office:value="5.2413162747913198" table:style-name="ce2">
            <text:p>5.2413162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omley</text:p>
          </table:table-cell>
          <table:table-cell office:value-type="float" office:value="65.526476189999997" table:style-name="ce2">
            <text:p>65.52647619</text:p>
          </table:table-cell>
          <table:table-cell office:value-type="float" office:value="27.483853239999998" table:style-name="ce2">
            <text:p>27.48385324</text:p>
          </table:table-cell>
          <table:table-cell office:value-type="float" office:value="21.61448" table:style-name="ce2">
            <text:p>21.61448</text:p>
          </table:table-cell>
          <table:table-cell office:value-type="float" office:value="14.163" table:style-name="ce2">
            <text:p>14.163</text:p>
          </table:table-cell>
          <table:table-cell office:value-type="string" table:style-name="ce2">
            <text:p>Medium</text:p>
          </table:table-cell>
          <table:table-cell office:value-type="float" office:value="1.8009200549403099" table:style-name="ce2">
            <text:p>1.8009200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exley</text:p>
          </table:table-cell>
          <table:table-cell office:value-type="float" office:value="97.518690140000004" table:style-name="ce2">
            <text:p>97.51869014</text:p>
          </table:table-cell>
          <table:table-cell office:value-type="float" office:value="51.938158970000003" table:style-name="ce2">
            <text:p>51.93815897</text:p>
          </table:table-cell>
          <table:table-cell office:value-type="float" office:value="21.65737" table:style-name="ce2">
            <text:p>21.65737</text:p>
          </table:table-cell>
          <table:table-cell office:value-type="float" office:value="16.273" table:style-name="ce2">
            <text:p>16.273</text:p>
          </table:table-cell>
          <table:table-cell office:value-type="string" table:style-name="ce2">
            <text:p>Medium</text:p>
          </table:table-cell>
          <table:table-cell office:value-type="float" office:value="5.0649412310374897" table:style-name="ce2">
            <text:p>5.06494123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hurrock</text:p>
          </table:table-cell>
          <table:table-cell office:value-type="float" office:value="117.6302582" table:style-name="ce2">
            <text:p>117.6302582</text:p>
          </table:table-cell>
          <table:table-cell office:value-type="float" office:value="22.051202889999999" table:style-name="ce2">
            <text:p>22.05120289</text:p>
          </table:table-cell>
          <table:table-cell office:value-type="float" office:value="21.67071" table:style-name="ce2">
            <text:p>21.67071</text:p>
          </table:table-cell>
          <table:table-cell office:value-type="float" office:value="20.928000000000001" table:style-name="ce2">
            <text:p>20.928</text:p>
          </table:table-cell>
          <table:table-cell office:value-type="string" table:style-name="ce2">
            <text:p>High</text:p>
          </table:table-cell>
          <table:table-cell office:value-type="float" office:value="2.59388868957129" table:style-name="ce2">
            <text:p>2.5938886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rrow</text:p>
          </table:table-cell>
          <table:table-cell office:value-type="float" office:value="200.2020235" table:style-name="ce2">
            <text:p>200.2020235</text:p>
          </table:table-cell>
          <table:table-cell office:value-type="float" office:value="108.87225100000001" table:style-name="ce2">
            <text:p>108.872251</text:p>
          </table:table-cell>
          <table:table-cell office:value-type="float" office:value="21.75367" table:style-name="ce2">
            <text:p>21.75367</text:p>
          </table:table-cell>
          <table:table-cell office:value-type="float" office:value="15.031000000000001" table:style-name="ce2">
            <text:p>15.031</text:p>
          </table:table-cell>
          <table:table-cell office:value-type="string" table:style-name="ce2">
            <text:p>Medium</text:p>
          </table:table-cell>
          <table:table-cell office:value-type="float" office:value="21.796444953199899" table:style-name="ce2">
            <text:p>21.796444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mmersmith and Fulham</text:p>
          </table:table-cell>
          <table:table-cell office:value-type="float" office:value="113.2176012" table:style-name="ce2">
            <text:p>113.2176012</text:p>
          </table:table-cell>
          <table:table-cell office:value-type="float" office:value="78.646029949999999" table:style-name="ce2">
            <text:p>78.64602995</text:p>
          </table:table-cell>
          <table:table-cell office:value-type="float" office:value="21.804030000000001" table:style-name="ce2">
            <text:p>21.80403</text:p>
          </table:table-cell>
          <table:table-cell office:value-type="float" office:value="22.27" table:style-name="ce2">
            <text:p>22.27</text:p>
          </table:table-cell>
          <table:table-cell office:value-type="string" table:style-name="ce2">
            <text:p>High</text:p>
          </table:table-cell>
          <table:table-cell office:value-type="float" office:value="8.9041148548423497" table:style-name="ce2">
            <text:p>8.9041148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ckney</text:p>
          </table:table-cell>
          <table:table-cell office:value-type="float" office:value="132.9509941" table:style-name="ce2">
            <text:p>132.9509941</text:p>
          </table:table-cell>
          <table:table-cell office:value-type="float" office:value="54.551405610000003" table:style-name="ce2">
            <text:p>54.55140561</text:p>
          </table:table-cell>
          <table:table-cell office:value-type="float" office:value="21.831759999999999" table:style-name="ce2">
            <text:p>21.83176</text:p>
          </table:table-cell>
          <table:table-cell office:value-type="float" office:value="32.526000000000003" table:style-name="ce2">
            <text:p>32.526</text:p>
          </table:table-cell>
          <table:table-cell office:value-type="string" table:style-name="ce2">
            <text:p>High</text:p>
          </table:table-cell>
          <table:table-cell office:value-type="float" office:value="7.2526636054018203" table:style-name="ce2">
            <text:p>7.2526636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rrey</text:p>
          </table:table-cell>
          <table:table-cell office:value-type="float" office:value="281.03501199999999" table:style-name="ce2">
            <text:p>281.035012</text:p>
          </table:table-cell>
          <table:table-cell office:value-type="float" office:value="95.983016649999996" table:style-name="ce2">
            <text:p>95.98301665</text:p>
          </table:table-cell>
          <table:table-cell office:value-type="float" office:value="21.873149999999999" table:style-name="ce2">
            <text:p>21.87315</text:p>
          </table:table-cell>
          <table:table-cell office:value-type="float" office:value="10.087" table:style-name="ce2">
            <text:p>10.087</text:p>
          </table:table-cell>
          <table:table-cell office:value-type="string" table:style-name="ce2">
            <text:p>Medium</text:p>
          </table:table-cell>
          <table:table-cell office:value-type="float" office:value="26.9745882360289" table:style-name="ce2">
            <text:p>26.9745882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entral Bedfordshire</text:p>
          </table:table-cell>
          <table:table-cell office:value-type="float" office:value="296.77806370000002" table:style-name="ce2">
            <text:p>296.7780637</text:p>
          </table:table-cell>
          <table:table-cell office:value-type="float" office:value="161.7647059" table:style-name="ce2">
            <text:p>161.7647059</text:p>
          </table:table-cell>
          <table:table-cell office:value-type="float" office:value="22.066960000000002" table:style-name="ce2">
            <text:p>22.06696</text:p>
          </table:table-cell>
          <table:table-cell office:value-type="float" office:value="12.151999999999999" table:style-name="ce2">
            <text:p>12.152</text:p>
          </table:table-cell>
          <table:table-cell office:value-type="string" table:style-name="ce2">
            <text:p>Medium</text:p>
          </table:table-cell>
          <table:table-cell office:value-type="float" office:value="48.008216192002003" table:style-name="ce2">
            <text:p>48.0082161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heshire East</text:p>
          </table:table-cell>
          <table:table-cell office:value-type="float" office:value="513.80935409999995" table:style-name="ce2">
            <text:p>513.8093541</text:p>
          </table:table-cell>
          <table:table-cell office:value-type="float" office:value="97.998383029999999" table:style-name="ce2">
            <text:p>97.99838303</text:p>
          </table:table-cell>
          <table:table-cell office:value-type="float" office:value="22.424969999999998" table:style-name="ce2">
            <text:p>22.42497</text:p>
          </table:table-cell>
          <table:table-cell office:value-type="float" office:value="14.475" table:style-name="ce2">
            <text:p>14.475</text:p>
          </table:table-cell>
          <table:table-cell office:value-type="string" table:style-name="ce2">
            <text:p>Medium</text:p>
          </table:table-cell>
          <table:table-cell office:value-type="float" office:value="50.352485887488697" table:style-name="ce2">
            <text:p>50.3524858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ensington and Chelsea</text:p>
          </table:table-cell>
          <table:table-cell office:value-type="float" office:value="119.36434490000001" table:style-name="ce2">
            <text:p>119.3643449</text:p>
          </table:table-cell>
          <table:table-cell office:value-type="float" office:value="109.0227203" table:style-name="ce2">
            <text:p>109.0227203</text:p>
          </table:table-cell>
          <table:table-cell office:value-type="float" office:value="22.4482" table:style-name="ce2">
            <text:p>22.4482</text:p>
          </table:table-cell>
          <table:table-cell office:value-type="float" office:value="21.526" table:style-name="ce2">
            <text:p>21.526</text:p>
          </table:table-cell>
          <table:table-cell office:value-type="string" table:style-name="ce2">
            <text:p>High</text:p>
          </table:table-cell>
          <table:table-cell office:value-type="float" office:value="13.013425587825401" table:style-name="ce2">
            <text:p>13.0134255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rrington</text:p>
          </table:table-cell>
          <table:table-cell office:value-type="float" office:value="327.19943819999997" table:style-name="ce2">
            <text:p>327.1994382</text:p>
          </table:table-cell>
          <table:table-cell office:value-type="float" office:value="79.269811790000006" table:style-name="ce2">
            <text:p>79.26981179</text:p>
          </table:table-cell>
          <table:table-cell office:value-type="float" office:value="22.546399999999998" table:style-name="ce2">
            <text:p>22.5464</text:p>
          </table:table-cell>
          <table:table-cell office:value-type="float" office:value="18.942" table:style-name="ce2">
            <text:p>18.942</text:p>
          </table:table-cell>
          <table:table-cell office:value-type="string" table:style-name="ce2">
            <text:p>Medium</text:p>
          </table:table-cell>
          <table:table-cell office:value-type="float" office:value="25.937037883907699" table:style-name="ce2">
            <text:p>25.937037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olton</text:p>
          </table:table-cell>
          <table:table-cell office:value-type="float" office:value="169.36729829999999" table:style-name="ce2">
            <text:p>169.3672983</text:p>
          </table:table-cell>
          <table:table-cell office:value-type="float" office:value="47.404919280000001" table:style-name="ce2">
            <text:p>47.40491928</text:p>
          </table:table-cell>
          <table:table-cell office:value-type="float" office:value="22.652989999999999" table:style-name="ce2">
            <text:p>22.65299</text:p>
          </table:table-cell>
          <table:table-cell office:value-type="float" office:value="30.690999999999999" table:style-name="ce2">
            <text:p>30.691</text:p>
          </table:table-cell>
          <table:table-cell office:value-type="string" table:style-name="ce2">
            <text:p>High</text:p>
          </table:table-cell>
          <table:table-cell office:value-type="float" office:value="8.0288431045831796" table:style-name="ce2">
            <text:p>8.0288431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reenwich</text:p>
          </table:table-cell>
          <table:table-cell office:value-type="float" office:value="90.459447139999995" table:style-name="ce2">
            <text:p>90.45944714</text:p>
          </table:table-cell>
          <table:table-cell office:value-type="float" office:value="38.434929660000002" table:style-name="ce2">
            <text:p>38.43492966</text:p>
          </table:table-cell>
          <table:table-cell office:value-type="float" office:value="22.689170000000001" table:style-name="ce2">
            <text:p>22.68917</text:p>
          </table:table-cell>
          <table:table-cell office:value-type="float" office:value="24.463999999999999" table:style-name="ce2">
            <text:p>24.464</text:p>
          </table:table-cell>
          <table:table-cell office:value-type="string" table:style-name="ce2">
            <text:p>High</text:p>
          </table:table-cell>
          <table:table-cell office:value-type="float" office:value="3.4768024879083899" table:style-name="ce2">
            <text:p>3.4768024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ertfordshire</text:p>
          </table:table-cell>
          <table:table-cell office:value-type="float" office:value="228.31981210000001" table:style-name="ce2">
            <text:p>228.3198121</text:p>
          </table:table-cell>
          <table:table-cell office:value-type="float" office:value="84.108902740000005" table:style-name="ce2">
            <text:p>84.10890274</text:p>
          </table:table-cell>
          <table:table-cell office:value-type="float" office:value="22.819790000000001" table:style-name="ce2">
            <text:p>22.81979</text:p>
          </table:table-cell>
          <table:table-cell office:value-type="float" office:value="12.731999999999999" table:style-name="ce2">
            <text:p>12.732</text:p>
          </table:table-cell>
          <table:table-cell office:value-type="string" table:style-name="ce2">
            <text:p>Medium</text:p>
          </table:table-cell>
          <table:table-cell office:value-type="float" office:value="19.203728869534" table:style-name="ce2">
            <text:p>19.2037288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uton</text:p>
          </table:table-cell>
          <table:table-cell office:value-type="float" office:value="227.54905289999999" table:style-name="ce2">
            <text:p>227.5490529</text:p>
          </table:table-cell>
          <table:table-cell office:value-type="float" office:value="91.351503980000004" table:style-name="ce2">
            <text:p>91.35150398</text:p>
          </table:table-cell>
          <table:table-cell office:value-type="float" office:value="22.834689999999998" table:style-name="ce2">
            <text:p>22.83469</text:p>
          </table:table-cell>
          <table:table-cell office:value-type="float" office:value="25.908000000000001" table:style-name="ce2">
            <text:p>25.908</text:p>
          </table:table-cell>
          <table:table-cell office:value-type="string" table:style-name="ce2">
            <text:p>High</text:p>
          </table:table-cell>
          <table:table-cell office:value-type="float" office:value="20.786948211639601" table:style-name="ce2">
            <text:p>20.7869482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illingdon</text:p>
          </table:table-cell>
          <table:table-cell office:value-type="float" office:value="138.5859609" table:style-name="ce2">
            <text:p>138.5859609</text:p>
          </table:table-cell>
          <table:table-cell office:value-type="float" office:value="67.389985850000002" table:style-name="ce2">
            <text:p>67.38998585</text:p>
          </table:table-cell>
          <table:table-cell office:value-type="float" office:value="22.848140000000001" table:style-name="ce2">
            <text:p>22.84814</text:p>
          </table:table-cell>
          <table:table-cell office:value-type="float" office:value="18.222999999999999" table:style-name="ce2">
            <text:p>18.223</text:p>
          </table:table-cell>
          <table:table-cell office:value-type="string" table:style-name="ce2">
            <text:p>Medium</text:p>
          </table:table-cell>
          <table:table-cell office:value-type="float" office:value="9.3393059440596495" table:style-name="ce2">
            <text:p>9.33930594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st Berkshire</text:p>
          </table:table-cell>
          <table:table-cell office:value-type="float" office:value="224.56226340000001" table:style-name="ce2">
            <text:p>224.5622634</text:p>
          </table:table-cell>
          <table:table-cell office:value-type="float" office:value="42.462845010000002" table:style-name="ce2">
            <text:p>42.46284501</text:p>
          </table:table-cell>
          <table:table-cell office:value-type="float" office:value="22.89134" table:style-name="ce2">
            <text:p>22.89134</text:p>
          </table:table-cell>
          <table:table-cell office:value-type="float" office:value="9.952" table:style-name="ce2">
            <text:p>9.952</text:p>
          </table:table-cell>
          <table:table-cell office:value-type="string" table:style-name="ce2">
            <text:p>Low</text:p>
          </table:table-cell>
          <table:table-cell office:value-type="float" office:value="9.5355525858490005" table:style-name="ce2">
            <text:p>9.53555258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acknell Forest</text:p>
          </table:table-cell>
          <table:table-cell office:value-type="float" office:value="413.80219219999998" table:style-name="ce2">
            <text:p>413.8021922</text:p>
          </table:table-cell>
          <table:table-cell office:value-type="float" office:value="69.815338429999997" table:style-name="ce2">
            <text:p>69.81533843</text:p>
          </table:table-cell>
          <table:table-cell office:value-type="float" office:value="22.989409999999999" table:style-name="ce2">
            <text:p>22.98941</text:p>
          </table:table-cell>
          <table:table-cell office:value-type="float" office:value="10.241" table:style-name="ce2">
            <text:p>10.241</text:p>
          </table:table-cell>
          <table:table-cell office:value-type="string" table:style-name="ce2">
            <text:p>Medium</text:p>
          </table:table-cell>
          <table:table-cell office:value-type="float" office:value="28.889740091518899" table:style-name="ce2">
            <text:p>28.8897400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ilton Keynes</text:p>
          </table:table-cell>
          <table:table-cell office:value-type="float" office:value="247.11753709999999" table:style-name="ce2">
            <text:p>247.1175371</text:p>
          </table:table-cell>
          <table:table-cell office:value-type="float" office:value="54.94731926" table:style-name="ce2">
            <text:p>54.94731926</text:p>
          </table:table-cell>
          <table:table-cell office:value-type="float" office:value="23.047730000000001" table:style-name="ce2">
            <text:p>23.04773</text:p>
          </table:table-cell>
          <table:table-cell office:value-type="float" office:value="17.98" table:style-name="ce2">
            <text:p>17.98</text:p>
          </table:table-cell>
          <table:table-cell office:value-type="string" table:style-name="ce2">
            <text:p>Medium</text:p>
          </table:table-cell>
          <table:table-cell office:value-type="float" office:value="13.578446205778601" table:style-name="ce2">
            <text:p>13.5784462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ambeth</text:p>
          </table:table-cell>
          <table:table-cell office:value-type="float" office:value="96.343151309999996" table:style-name="ce2">
            <text:p>96.34315131</text:p>
          </table:table-cell>
          <table:table-cell office:value-type="float" office:value="47.918423679999997" table:style-name="ce2">
            <text:p>47.91842368</text:p>
          </table:table-cell>
          <table:table-cell office:value-type="float" office:value="23.102180000000001" table:style-name="ce2">
            <text:p>23.10218</text:p>
          </table:table-cell>
          <table:table-cell office:value-type="float" office:value="25.422000000000001" table:style-name="ce2">
            <text:p>25.422</text:p>
          </table:table-cell>
          <table:table-cell office:value-type="string" table:style-name="ce2">
            <text:p>High</text:p>
          </table:table-cell>
          <table:table-cell office:value-type="float" office:value="4.6166119431389303" table:style-name="ce2">
            <text:p>4.61661194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olverhampton</text:p>
          </table:table-cell>
          <table:table-cell office:value-type="float" office:value="267.19157259999997" table:style-name="ce2">
            <text:p>267.1915726</text:p>
          </table:table-cell>
          <table:table-cell office:value-type="float" office:value="61.189212339999997" table:style-name="ce2">
            <text:p>61.18921234</text:p>
          </table:table-cell>
          <table:table-cell office:value-type="float" office:value="23.105329999999999" table:style-name="ce2">
            <text:p>23.10533</text:p>
          </table:table-cell>
          <table:table-cell office:value-type="float" office:value="32.101999999999997" table:style-name="ce2">
            <text:p>32.102</text:p>
          </table:table-cell>
          <table:table-cell office:value-type="string" table:style-name="ce2">
            <text:p>High</text:p>
          </table:table-cell>
          <table:table-cell office:value-type="float" office:value="16.349241871279901" table:style-name="ce2">
            <text:p>16.3492418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ringey</text:p>
          </table:table-cell>
          <table:table-cell office:value-type="float" office:value="133.0646654" table:style-name="ce2">
            <text:p>133.0646654</text:p>
          </table:table-cell>
          <table:table-cell office:value-type="float" office:value="102.7077498" table:style-name="ce2">
            <text:p>102.7077498</text:p>
          </table:table-cell>
          <table:table-cell office:value-type="float" office:value="23.2181" table:style-name="ce2">
            <text:p>23.2181</text:p>
          </table:table-cell>
          <table:table-cell office:value-type="float" office:value="27.956" table:style-name="ce2">
            <text:p>27.956</text:p>
          </table:table-cell>
          <table:table-cell office:value-type="string" table:style-name="ce2">
            <text:p>High</text:p>
          </table:table-cell>
          <table:table-cell office:value-type="float" office:value="13.6667723611239" table:style-name="ce2">
            <text:p>13.6667723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nfield</text:p>
          </table:table-cell>
          <table:table-cell office:value-type="float" office:value="86.671147270000006" table:style-name="ce2">
            <text:p>86.67114727</text:p>
          </table:table-cell>
          <table:table-cell office:value-type="float" office:value="74.588829079999996" table:style-name="ce2">
            <text:p>74.58882908</text:p>
          </table:table-cell>
          <table:table-cell office:value-type="float" office:value="23.353680000000001" table:style-name="ce2">
            <text:p>23.35368</text:p>
          </table:table-cell>
          <table:table-cell office:value-type="float" office:value="25.780999999999999" table:style-name="ce2">
            <text:p>25.781</text:p>
          </table:table-cell>
          <table:table-cell office:value-type="string" table:style-name="ce2">
            <text:p>High</text:p>
          </table:table-cell>
          <table:table-cell office:value-type="float" office:value="6.4646993898895397" table:style-name="ce2">
            <text:p>6.4646993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mbridgeshire</text:p>
          </table:table-cell>
          <table:table-cell office:value-type="float" office:value="277.01837599999999" table:style-name="ce2">
            <text:p>277.018376</text:p>
          </table:table-cell>
          <table:table-cell office:value-type="float" office:value="75.4359118" table:style-name="ce2">
            <text:p>75.4359118</text:p>
          </table:table-cell>
          <table:table-cell office:value-type="float" office:value="23.359929999999999" table:style-name="ce2">
            <text:p>23.35993</text:p>
          </table:table-cell>
          <table:table-cell office:value-type="float" office:value="13.858000000000001" table:style-name="ce2">
            <text:p>13.858</text:p>
          </table:table-cell>
          <table:table-cell office:value-type="string" table:style-name="ce2">
            <text:p>Medium</text:p>
          </table:table-cell>
          <table:table-cell office:value-type="float" office:value="20.897133778915201" table:style-name="ce2">
            <text:p>20.897133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eicestershire</text:p>
          </table:table-cell>
          <table:table-cell office:value-type="float" office:value="296.78763930000002" table:style-name="ce2">
            <text:p>296.7876393</text:p>
          </table:table-cell>
          <table:table-cell office:value-type="float" office:value="51.663922739999997" table:style-name="ce2">
            <text:p>51.66392274</text:p>
          </table:table-cell>
          <table:table-cell office:value-type="float" office:value="23.56129" table:style-name="ce2">
            <text:p>23.56129</text:p>
          </table:table-cell>
          <table:table-cell office:value-type="float" office:value="12.33" table:style-name="ce2">
            <text:p>12.33</text:p>
          </table:table-cell>
          <table:table-cell office:value-type="string" table:style-name="ce2">
            <text:p>Medium</text:p>
          </table:table-cell>
          <table:table-cell office:value-type="float" office:value="15.3332136669822" table:style-name="ce2">
            <text:p>15.3332136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ltham Forest</text:p>
          </table:table-cell>
          <table:table-cell office:value-type="float" office:value="103.79409769999999" table:style-name="ce2">
            <text:p>103.7940977</text:p>
          </table:table-cell>
          <table:table-cell office:value-type="float" office:value="40.256352450000001" table:style-name="ce2">
            <text:p>40.25635245</text:p>
          </table:table-cell>
          <table:table-cell office:value-type="float" office:value="23.704260000000001" table:style-name="ce2">
            <text:p>23.70426</text:p>
          </table:table-cell>
          <table:table-cell office:value-type="float" office:value="25.209" table:style-name="ce2">
            <text:p>25.209</text:p>
          </table:table-cell>
          <table:table-cell office:value-type="string" table:style-name="ce2">
            <text:p>High</text:p>
          </table:table-cell>
          <table:table-cell office:value-type="float" office:value="4.1783717792409298" table:style-name="ce2">
            <text:p>4.17837177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st Northamptonshire</text:p>
          </table:table-cell>
          <table:table-cell office:value-type="float" office:value="437.22314" table:style-name="ce2">
            <text:p>437.22314</text:p>
          </table:table-cell>
          <table:table-cell office:value-type="float" office:value="89.533058769999997" table:style-name="ce2">
            <text:p>89.53305877</text:p>
          </table:table-cell>
          <table:table-cell office:value-type="float" office:value="23.710819999999998" table:style-name="ce2">
            <text:p>23.71082</text:p>
          </table:table-cell>
          <table:table-cell office:value-type="float" office:value="17.708314865733001" table:style-name="ce2">
            <text:p>17.70831487</text:p>
          </table:table-cell>
          <table:table-cell office:value-type="string" table:style-name="ce2">
            <text:p>Medium</text:p>
          </table:table-cell>
          <table:table-cell office:value-type="float" office:value="39.145925089223901" table:style-name="ce2">
            <text:p>39.1459250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nchester</text:p>
          </table:table-cell>
          <table:table-cell office:value-type="float" office:value="193.84500779999999" table:style-name="ce2">
            <text:p>193.8450078</text:p>
          </table:table-cell>
          <table:table-cell office:value-type="float" office:value="38.525253300000003" table:style-name="ce2">
            <text:p>38.5252533</text:p>
          </table:table-cell>
          <table:table-cell office:value-type="float" office:value="23.804290000000002" table:style-name="ce2">
            <text:p>23.80429</text:p>
          </table:table-cell>
          <table:table-cell office:value-type="float" office:value="40.005000000000003" table:style-name="ce2">
            <text:p>40.005</text:p>
          </table:table-cell>
          <table:table-cell office:value-type="string" table:style-name="ce2">
            <text:p>High</text:p>
          </table:table-cell>
          <table:table-cell office:value-type="float" office:value="7.4679280264354801" table:style-name="ce2">
            <text:p>7.4679280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Tyneside</text:p>
          </table:table-cell>
          <table:table-cell office:value-type="float" office:value="784.88491910000005" table:style-name="ce2">
            <text:p>784.8849191</text:p>
          </table:table-cell>
          <table:table-cell office:value-type="float" office:value="71.365701639999997" table:style-name="ce2">
            <text:p>71.36570164</text:p>
          </table:table-cell>
          <table:table-cell office:value-type="float" office:value="23.887899999999998" table:style-name="ce2">
            <text:p>23.8879</text:p>
          </table:table-cell>
          <table:table-cell office:value-type="float" office:value="22.279" table:style-name="ce2">
            <text:p>22.279</text:p>
          </table:table-cell>
          <table:table-cell office:value-type="string" table:style-name="ce2">
            <text:p>High</text:p>
          </table:table-cell>
          <table:table-cell office:value-type="float" office:value="56.013862958226099" table:style-name="ce2">
            <text:p>56.0138629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eicester</text:p>
          </table:table-cell>
          <table:table-cell office:value-type="float" office:value="274.57696049999998" table:style-name="ce2">
            <text:p>274.5769605</text:p>
          </table:table-cell>
          <table:table-cell office:value-type="float" office:value="50.717940630000001" table:style-name="ce2">
            <text:p>50.71794063</text:p>
          </table:table-cell>
          <table:table-cell office:value-type="float" office:value="24.092199999999998" table:style-name="ce2">
            <text:p>24.0922</text:p>
          </table:table-cell>
          <table:table-cell office:value-type="float" office:value="30.876999999999999" table:style-name="ce2">
            <text:p>30.877</text:p>
          </table:table-cell>
          <table:table-cell office:value-type="string" table:style-name="ce2">
            <text:p>High</text:p>
          </table:table-cell>
          <table:table-cell office:value-type="float" office:value="13.9259779810049" table:style-name="ce2">
            <text:p>13.9259779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ockport</text:p>
          </table:table-cell>
          <table:table-cell office:value-type="float" office:value="233.48060469999999" table:style-name="ce2">
            <text:p>233.4806047</text:p>
          </table:table-cell>
          <table:table-cell office:value-type="float" office:value="54.600480480000002" table:style-name="ce2">
            <text:p>54.60048048</text:p>
          </table:table-cell>
          <table:table-cell office:value-type="float" office:value="24.110790000000001" table:style-name="ce2">
            <text:p>24.11079</text:p>
          </table:table-cell>
          <table:table-cell office:value-type="float" office:value="20.826000000000001" table:style-name="ce2">
            <text:p>20.826</text:p>
          </table:table-cell>
          <table:table-cell office:value-type="string" table:style-name="ce2">
            <text:p>High</text:p>
          </table:table-cell>
          <table:table-cell office:value-type="float" office:value="12.7481531993809" table:style-name="ce2">
            <text:p>12.748153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indsor and Maidenhead</text:p>
          </table:table-cell>
          <table:table-cell office:value-type="float" office:value="215.3734211" table:style-name="ce2">
            <text:p>215.3734211</text:p>
          </table:table-cell>
          <table:table-cell office:value-type="float" office:value="43.756016449999997" table:style-name="ce2">
            <text:p>43.75601645</text:p>
          </table:table-cell>
          <table:table-cell office:value-type="float" office:value="24.217770000000002" table:style-name="ce2">
            <text:p>24.21777</text:p>
          </table:table-cell>
          <table:table-cell office:value-type="float" office:value="8.3759999999999994" table:style-name="ce2">
            <text:p>8.376</text:p>
          </table:table-cell>
          <table:table-cell office:value-type="string" table:style-name="ce2">
            <text:p>Low</text:p>
          </table:table-cell>
          <table:table-cell office:value-type="float" office:value="9.4238829565443805" table:style-name="ce2">
            <text:p>9.4238829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rklees</text:p>
          </table:table-cell>
          <table:table-cell office:value-type="float" office:value="197.75531549999999" table:style-name="ce2">
            <text:p>197.7553155</text:p>
          </table:table-cell>
          <table:table-cell office:value-type="float" office:value="50.645220100000003" table:style-name="ce2">
            <text:p>50.6452201</text:p>
          </table:table-cell>
          <table:table-cell office:value-type="float" office:value="24.325949999999999" table:style-name="ce2">
            <text:p>24.32595</text:p>
          </table:table-cell>
          <table:table-cell office:value-type="float" office:value="25.151" table:style-name="ce2">
            <text:p>25.151</text:p>
          </table:table-cell>
          <table:table-cell office:value-type="string" table:style-name="ce2">
            <text:p>High</text:p>
          </table:table-cell>
          <table:table-cell office:value-type="float" office:value="10.015361479442401" table:style-name="ce2">
            <text:p>10.0153614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affordshire</text:p>
          </table:table-cell>
          <table:table-cell office:value-type="float" office:value="308.41099109999999" table:style-name="ce2">
            <text:p>308.4109911</text:p>
          </table:table-cell>
          <table:table-cell office:value-type="float" office:value="80.966040530000001" table:style-name="ce2">
            <text:p>80.96604053</text:p>
          </table:table-cell>
          <table:table-cell office:value-type="float" office:value="24.412469999999999" table:style-name="ce2">
            <text:p>24.41247</text:p>
          </table:table-cell>
          <table:table-cell office:value-type="float" office:value="16.567" table:style-name="ce2">
            <text:p>16.567</text:p>
          </table:table-cell>
          <table:table-cell office:value-type="string" table:style-name="ce2">
            <text:p>Medium</text:p>
          </table:table-cell>
          <table:table-cell office:value-type="float" office:value="24.9708168053001" table:style-name="ce2">
            <text:p>24.9708168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ournemouth, Christchurch and Poole</text:p>
          </table:table-cell>
          <table:table-cell office:value-type="float" office:value="412.75930679999999" table:style-name="ce2">
            <text:p>412.7593068</text:p>
          </table:table-cell>
          <table:table-cell office:value-type="float" office:value="67.308339500000002" table:style-name="ce2">
            <text:p>67.3083395</text:p>
          </table:table-cell>
          <table:table-cell office:value-type="float" office:value="24.455919999999999" table:style-name="ce2">
            <text:p>24.45592</text:p>
          </table:table-cell>
          <table:table-cell office:value-type="float" office:value="18.172999999999998" table:style-name="ce2">
            <text:p>18.173</text:p>
          </table:table-cell>
          <table:table-cell office:value-type="string" table:style-name="ce2">
            <text:p>Medium</text:p>
          </table:table-cell>
          <table:table-cell office:value-type="float" office:value="27.782143553879099" table:style-name="ce2">
            <text:p>27.782143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th and North East Somerset</text:p>
          </table:table-cell>
          <table:table-cell office:value-type="float" office:value="434.4396256" table:style-name="ce2">
            <text:p>434.4396256</text:p>
          </table:table-cell>
          <table:table-cell office:value-type="float" office:value="96.014045479999993" table:style-name="ce2">
            <text:p>96.01404548</text:p>
          </table:table-cell>
          <table:table-cell office:value-type="float" office:value="24.48151" table:style-name="ce2">
            <text:p>24.48151</text:p>
          </table:table-cell>
          <table:table-cell office:value-type="float" office:value="11.744999999999999" table:style-name="ce2">
            <text:p>11.745</text:p>
          </table:table-cell>
          <table:table-cell office:value-type="string" table:style-name="ce2">
            <text:p>Medium</text:p>
          </table:table-cell>
          <table:table-cell office:value-type="float" office:value="41.712305970672602" table:style-name="ce2">
            <text:p>41.7123059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edford</text:p>
          </table:table-cell>
          <table:table-cell office:value-type="float" office:value="198.20312680000001" table:style-name="ce2">
            <text:p>198.2031268</text:p>
          </table:table-cell>
          <table:table-cell office:value-type="float" office:value="116.09008590000001" table:style-name="ce2">
            <text:p>116.0900859</text:p>
          </table:table-cell>
          <table:table-cell office:value-type="float" office:value="24.55686" table:style-name="ce2">
            <text:p>24.55686</text:p>
          </table:table-cell>
          <table:table-cell office:value-type="float" office:value="18.931999999999999" table:style-name="ce2">
            <text:p>18.932</text:p>
          </table:table-cell>
          <table:table-cell office:value-type="string" table:style-name="ce2">
            <text:p>Medium</text:p>
          </table:table-cell>
          <table:table-cell office:value-type="float" office:value="23.0094180158606" table:style-name="ce2">
            <text:p>23.0094180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stmorland and Furness</text:p>
          </table:table-cell>
          <table:table-cell office:value-type="float" office:value="441.31287880000002" table:style-name="ce2">
            <text:p>441.3128788</text:p>
          </table:table-cell>
          <table:table-cell office:value-type="float" office:value="102.6404249" table:style-name="ce2">
            <text:p>102.6404249</text:p>
          </table:table-cell>
          <table:table-cell office:value-type="float" office:value="24.609919999999999" table:style-name="ce2">
            <text:p>24.60992</text:p>
          </table:table-cell>
          <table:table-cell office:value-type="float" office:value="19.023" table:style-name="ce2">
            <text:p>19.023</text:p>
          </table:table-cell>
          <table:table-cell office:value-type="string" table:style-name="ce2">
            <text:p>Medium</text:p>
          </table:table-cell>
          <table:table-cell office:value-type="float" office:value="45.2965413938742" table:style-name="ce2">
            <text:p>45.2965413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ssex</text:p>
          </table:table-cell>
          <table:table-cell office:value-type="float" office:value="185.23905450000001" table:style-name="ce2">
            <text:p>185.2390545</text:p>
          </table:table-cell>
          <table:table-cell office:value-type="float" office:value="51.113341509999998" table:style-name="ce2">
            <text:p>51.11334151</text:p>
          </table:table-cell>
          <table:table-cell office:value-type="float" office:value="24.614719999999998" table:style-name="ce2">
            <text:p>24.61472</text:p>
          </table:table-cell>
          <table:table-cell office:value-type="float" office:value="17.015999999999998" table:style-name="ce2">
            <text:p>17.016</text:p>
          </table:table-cell>
          <table:table-cell office:value-type="string" table:style-name="ce2">
            <text:p>Medium</text:p>
          </table:table-cell>
          <table:table-cell office:value-type="float" office:value="9.4681870536480002" table:style-name="ce2">
            <text:p>9.46818705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umberland</text:p>
          </table:table-cell>
          <table:table-cell office:value-type="float" office:value="739.57209390000003" table:style-name="ce2">
            <text:p>739.5720939</text:p>
          </table:table-cell>
          <table:table-cell office:value-type="float" office:value="85.016663269999995" table:style-name="ce2">
            <text:p>85.01666327</text:p>
          </table:table-cell>
          <table:table-cell office:value-type="float" office:value="24.647040000000001" table:style-name="ce2">
            <text:p>24.64704</text:p>
          </table:table-cell>
          <table:table-cell office:value-type="float" office:value="22.079000000000001" table:style-name="ce2">
            <text:p>22.079</text:p>
          </table:table-cell>
          <table:table-cell office:value-type="string" table:style-name="ce2">
            <text:p>High</text:p>
          </table:table-cell>
          <table:table-cell office:value-type="float" office:value="62.875951670985103" table:style-name="ce2">
            <text:p>62.8759516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mpshire</text:p>
          </table:table-cell>
          <table:table-cell office:value-type="float" office:value="441.53391049999999" table:style-name="ce2">
            <text:p>441.5339105</text:p>
          </table:table-cell>
          <table:table-cell office:value-type="float" office:value="106.788978" table:style-name="ce2">
            <text:p>106.788978</text:p>
          </table:table-cell>
          <table:table-cell office:value-type="float" office:value="24.686119999999999" table:style-name="ce2">
            <text:p>24.68612</text:p>
          </table:table-cell>
          <table:table-cell office:value-type="float" office:value="12.693" table:style-name="ce2">
            <text:p>12.693</text:p>
          </table:table-cell>
          <table:table-cell office:value-type="string" table:style-name="ce2">
            <text:p>Medium</text:p>
          </table:table-cell>
          <table:table-cell office:value-type="float" office:value="47.150955054638501" table:style-name="ce2">
            <text:p>47.150955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rbyshire</text:p>
          </table:table-cell>
          <table:table-cell office:value-type="float" office:value="284.6039859" table:style-name="ce2">
            <text:p>284.6039859</text:p>
          </table:table-cell>
          <table:table-cell office:value-type="float" office:value="74.439438659999993" table:style-name="ce2">
            <text:p>74.43943866</text:p>
          </table:table-cell>
          <table:table-cell office:value-type="float" office:value="24.862819999999999" table:style-name="ce2">
            <text:p>24.86282</text:p>
          </table:table-cell>
          <table:table-cell office:value-type="float" office:value="18.391999999999999" table:style-name="ce2">
            <text:p>18.392</text:p>
          </table:table-cell>
          <table:table-cell office:value-type="string" table:style-name="ce2">
            <text:p>Medium</text:p>
          </table:table-cell>
          <table:table-cell office:value-type="float" office:value="21.185760950794599" table:style-name="ce2">
            <text:p>21.185760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ttinghamshire</text:p>
          </table:table-cell>
          <table:table-cell office:value-type="float" office:value="233.39154629999999" table:style-name="ce2">
            <text:p>233.3915463</text:p>
          </table:table-cell>
          <table:table-cell office:value-type="float" office:value="94.708741020000005" table:style-name="ce2">
            <text:p>94.70874102</text:p>
          </table:table-cell>
          <table:table-cell office:value-type="float" office:value="24.93299" table:style-name="ce2">
            <text:p>24.93299</text:p>
          </table:table-cell>
          <table:table-cell office:value-type="float" office:value="18.998999999999999" table:style-name="ce2">
            <text:p>18.999</text:p>
          </table:table-cell>
          <table:table-cell office:value-type="string" table:style-name="ce2">
            <text:p>Medium</text:p>
          </table:table-cell>
          <table:table-cell office:value-type="float" office:value="22.104219514783999" table:style-name="ce2">
            <text:p>22.1042195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st Sussex</text:p>
          </table:table-cell>
          <table:table-cell office:value-type="float" office:value="336.06683829999997" table:style-name="ce2">
            <text:p>336.0668383</text:p>
          </table:table-cell>
          <table:table-cell office:value-type="float" office:value="61.449767610000002" table:style-name="ce2">
            <text:p>61.44976761</text:p>
          </table:table-cell>
          <table:table-cell office:value-type="float" office:value="24.984000000000002" table:style-name="ce2">
            <text:p>24.984</text:p>
          </table:table-cell>
          <table:table-cell office:value-type="float" office:value="14.429" table:style-name="ce2">
            <text:p>14.429</text:p>
          </table:table-cell>
          <table:table-cell office:value-type="string" table:style-name="ce2">
            <text:p>Medium</text:p>
          </table:table-cell>
          <table:table-cell office:value-type="float" office:value="20.651229114962401" table:style-name="ce2">
            <text:p>20.6512291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ameside</text:p>
          </table:table-cell>
          <table:table-cell office:value-type="float" office:value="265.61142710000001" table:style-name="ce2">
            <text:p>265.6114271</text:p>
          </table:table-cell>
          <table:table-cell office:value-type="float" office:value="57.657934689999998" table:style-name="ce2">
            <text:p>57.65793469</text:p>
          </table:table-cell>
          <table:table-cell office:value-type="float" office:value="25.023990000000001" table:style-name="ce2">
            <text:p>25.02399</text:p>
          </table:table-cell>
          <table:table-cell office:value-type="float" office:value="31.373999999999999" table:style-name="ce2">
            <text:p>31.374</text:p>
          </table:table-cell>
          <table:table-cell office:value-type="string" table:style-name="ce2">
            <text:p>High</text:p>
          </table:table-cell>
          <table:table-cell office:value-type="float" office:value="15.314606316649501" table:style-name="ce2">
            <text:p>15.3146063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iltshire</text:p>
          </table:table-cell>
          <table:table-cell office:value-type="float" office:value="554.48136150000005" table:style-name="ce2">
            <text:p>554.4813615</text:p>
          </table:table-cell>
          <table:table-cell office:value-type="float" office:value="91.919768559999994" table:style-name="ce2">
            <text:p>91.91976856</text:p>
          </table:table-cell>
          <table:table-cell office:value-type="float" office:value="25.071020000000001" table:style-name="ce2">
            <text:p>25.07102</text:p>
          </table:table-cell>
          <table:table-cell office:value-type="float" office:value="13.446999999999999" table:style-name="ce2">
            <text:p>13.447</text:p>
          </table:table-cell>
          <table:table-cell office:value-type="string" table:style-name="ce2">
            <text:p>Medium</text:p>
          </table:table-cell>
          <table:table-cell office:value-type="float" office:value="50.967798419913699" table:style-name="ce2">
            <text:p>50.9677984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loucestershire</text:p>
          </table:table-cell>
          <table:table-cell office:value-type="float" office:value="323.8230332" table:style-name="ce2">
            <text:p>323.8230332</text:p>
          </table:table-cell>
          <table:table-cell office:value-type="float" office:value="88.141516949999996" table:style-name="ce2">
            <text:p>88.14151695</text:p>
          </table:table-cell>
          <table:table-cell office:value-type="float" office:value="25.154969999999999" table:style-name="ce2">
            <text:p>25.15497</text:p>
          </table:table-cell>
          <table:table-cell office:value-type="float" office:value="14.932" table:style-name="ce2">
            <text:p>14.932</text:p>
          </table:table-cell>
          <table:table-cell office:value-type="string" table:style-name="ce2">
            <text:p>Medium</text:p>
          </table:table-cell>
          <table:table-cell office:value-type="float" office:value="28.5422533695982" table:style-name="ce2">
            <text:p>28.5422533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eterborough</text:p>
          </table:table-cell>
          <table:table-cell office:value-type="float" office:value="298.44335100000001" table:style-name="ce2">
            <text:p>298.443351</text:p>
          </table:table-cell>
          <table:table-cell office:value-type="float" office:value="71.48346051" table:style-name="ce2">
            <text:p>71.48346051</text:p>
          </table:table-cell>
          <table:table-cell office:value-type="float" office:value="25.168430000000001" table:style-name="ce2">
            <text:p>25.16843</text:p>
          </table:table-cell>
          <table:table-cell office:value-type="float" office:value="27.821000000000002" table:style-name="ce2">
            <text:p>27.821</text:p>
          </table:table-cell>
          <table:table-cell office:value-type="string" table:style-name="ce2">
            <text:p>High</text:p>
          </table:table-cell>
          <table:table-cell office:value-type="float" office:value="21.3337634956806" table:style-name="ce2">
            <text:p>21.33376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igan</text:p>
          </table:table-cell>
          <table:table-cell office:value-type="float" office:value="167.4221714" table:style-name="ce2">
            <text:p>167.4221714</text:p>
          </table:table-cell>
          <table:table-cell office:value-type="float" office:value="42.526650029999999" table:style-name="ce2">
            <text:p>42.52665003</text:p>
          </table:table-cell>
          <table:table-cell office:value-type="float" office:value="25.209" table:style-name="ce2">
            <text:p>25.209</text:p>
          </table:table-cell>
          <table:table-cell office:value-type="float" office:value="25.713000000000001" table:style-name="ce2">
            <text:p>25.713</text:p>
          </table:table-cell>
          <table:table-cell office:value-type="string" table:style-name="ce2">
            <text:p>High</text:p>
          </table:table-cell>
          <table:table-cell office:value-type="float" office:value="7.11990409039048" table:style-name="ce2">
            <text:p>7.1199040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edway</text:p>
          </table:table-cell>
          <table:table-cell office:value-type="float" office:value="247.99816519999999" table:style-name="ce2">
            <text:p>247.9981652</text:p>
          </table:table-cell>
          <table:table-cell office:value-type="float" office:value="112.465698" table:style-name="ce2">
            <text:p>112.465698</text:p>
          </table:table-cell>
          <table:table-cell office:value-type="float" office:value="25.328209999999999" table:style-name="ce2">
            <text:p>25.32821</text:p>
          </table:table-cell>
          <table:table-cell office:value-type="float" office:value="23.936" table:style-name="ce2">
            <text:p>23.936</text:p>
          </table:table-cell>
          <table:table-cell office:value-type="string" table:style-name="ce2">
            <text:p>High</text:p>
          </table:table-cell>
          <table:table-cell office:value-type="float" office:value="27.891286751937301" table:style-name="ce2">
            <text:p>27.891286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orcestershire</text:p>
          </table:table-cell>
          <table:table-cell office:value-type="float" office:value="201.75314729999999" table:style-name="ce2">
            <text:p>201.7531473</text:p>
          </table:table-cell>
          <table:table-cell office:value-type="float" office:value="58.508370880000001" table:style-name="ce2">
            <text:p>58.50837088</text:p>
          </table:table-cell>
          <table:table-cell office:value-type="float" office:value="25.47944" table:style-name="ce2">
            <text:p>25.47944</text:p>
          </table:table-cell>
          <table:table-cell office:value-type="float" office:value="18.088999999999999" table:style-name="ce2">
            <text:p>18.089</text:p>
          </table:table-cell>
          <table:table-cell office:value-type="string" table:style-name="ce2">
            <text:p>Medium</text:p>
          </table:table-cell>
          <table:table-cell office:value-type="float" office:value="11.8042479684357" table:style-name="ce2">
            <text:p>11.8042479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stminster</text:p>
          </table:table-cell>
          <table:table-cell office:value-type="float" office:value="176.41198940000001" table:style-name="ce2">
            <text:p>176.4119894</text:p>
          </table:table-cell>
          <table:table-cell office:value-type="float" office:value="99.535500999999996" table:style-name="ce2">
            <text:p>99.535501</text:p>
          </table:table-cell>
          <table:table-cell office:value-type="float" office:value="25.527100000000001" table:style-name="ce2">
            <text:p>25.5271</text:p>
          </table:table-cell>
          <table:table-cell office:value-type="float" office:value="20.338999999999999" table:style-name="ce2">
            <text:p>20.339</text:p>
          </table:table-cell>
          <table:table-cell office:value-type="string" table:style-name="ce2">
            <text:p>High</text:p>
          </table:table-cell>
          <table:table-cell office:value-type="float" office:value="17.559255747335701" table:style-name="ce2">
            <text:p>17.559255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ldham</text:p>
          </table:table-cell>
          <table:table-cell office:value-type="float" office:value="224.4487072" table:style-name="ce2">
            <text:p>224.4487072</text:p>
          </table:table-cell>
          <table:table-cell office:value-type="float" office:value="23.811413600000002" table:style-name="ce2">
            <text:p>23.8114136</text:p>
          </table:table-cell>
          <table:table-cell office:value-type="float" office:value="25.616299999999999" table:style-name="ce2">
            <text:p>25.6163</text:p>
          </table:table-cell>
          <table:table-cell office:value-type="float" office:value="33.155000000000001" table:style-name="ce2">
            <text:p>33.155</text:p>
          </table:table-cell>
          <table:table-cell office:value-type="string" table:style-name="ce2">
            <text:p>High</text:p>
          </table:table-cell>
          <table:table-cell office:value-type="float" office:value="5.3444409991245001" table:style-name="ce2">
            <text:p>5.3444409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York</text:p>
          </table:table-cell>
          <table:table-cell office:value-type="float" office:value="178.32791169999999" table:style-name="ce2">
            <text:p>178.3279117</text:p>
          </table:table-cell>
          <table:table-cell office:value-type="float" office:value="115.56685539999999" table:style-name="ce2">
            <text:p>115.5668554</text:p>
          </table:table-cell>
          <table:table-cell office:value-type="float" office:value="25.833829999999999" table:style-name="ce2">
            <text:p>25.83383</text:p>
          </table:table-cell>
          <table:table-cell office:value-type="float" office:value="11.727" table:style-name="ce2">
            <text:p>11.727</text:p>
          </table:table-cell>
          <table:table-cell office:value-type="string" table:style-name="ce2">
            <text:p>Medium</text:p>
          </table:table-cell>
          <table:table-cell office:value-type="float" office:value="20.608795985217899" table:style-name="ce2">
            <text:p>20.608795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uckinghamshire UA</text:p>
          </table:table-cell>
          <table:table-cell office:value-type="float" office:value="314.1460697" table:style-name="ce2">
            <text:p>314.1460697</text:p>
          </table:table-cell>
          <table:table-cell office:value-type="float" office:value="62.688064189999999" table:style-name="ce2">
            <text:p>62.68806419</text:p>
          </table:table-cell>
          <table:table-cell office:value-type="float" office:value="25.870650000000001" table:style-name="ce2">
            <text:p>25.87065</text:p>
          </table:table-cell>
          <table:table-cell office:value-type="float" office:value="10.052" table:style-name="ce2">
            <text:p>10.052</text:p>
          </table:table-cell>
          <table:table-cell office:value-type="string" table:style-name="ce2">
            <text:p>Medium</text:p>
          </table:table-cell>
          <table:table-cell office:value-type="float" office:value="19.693208982389798" table:style-name="ce2">
            <text:p>19.6932089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ventry</text:p>
          </table:table-cell>
          <table:table-cell office:value-type="float" office:value="176.89224229999999" table:style-name="ce2">
            <text:p>176.8922423</text:p>
          </table:table-cell>
          <table:table-cell office:value-type="float" office:value="55.904787929999998" table:style-name="ce2">
            <text:p>55.90478793</text:p>
          </table:table-cell>
          <table:table-cell office:value-type="float" office:value="25.890799999999999" table:style-name="ce2">
            <text:p>25.8908</text:p>
          </table:table-cell>
          <table:table-cell office:value-type="float" office:value="25.613" table:style-name="ce2">
            <text:p>25.613</text:p>
          </table:table-cell>
          <table:table-cell office:value-type="string" table:style-name="ce2">
            <text:p>High</text:p>
          </table:table-cell>
          <table:table-cell office:value-type="float" office:value="9.8891232922436707" table:style-name="ce2">
            <text:p>9.88912329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windon</text:p>
          </table:table-cell>
          <table:table-cell office:value-type="float" office:value="681.362708" table:style-name="ce2">
            <text:p>681.362708</text:p>
          </table:table-cell>
          <table:table-cell office:value-type="float" office:value="103.80492219999999" table:style-name="ce2">
            <text:p>103.8049222</text:p>
          </table:table-cell>
          <table:table-cell office:value-type="float" office:value="25.991250000000001" table:style-name="ce2">
            <text:p>25.99125</text:p>
          </table:table-cell>
          <table:table-cell office:value-type="float" office:value="18.622" table:style-name="ce2">
            <text:p>18.622</text:p>
          </table:table-cell>
          <table:table-cell office:value-type="string" table:style-name="ce2">
            <text:p>Medium</text:p>
          </table:table-cell>
          <table:table-cell office:value-type="float" office:value="70.728802893921298" table:style-name="ce2">
            <text:p>70.7288028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ading</text:p>
          </table:table-cell>
          <table:table-cell office:value-type="float" office:value="142.21902220000001" table:style-name="ce2">
            <text:p>142.2190222</text:p>
          </table:table-cell>
          <table:table-cell office:value-type="float" office:value="39.547575729999998" table:style-name="ce2">
            <text:p>39.54757573</text:p>
          </table:table-cell>
          <table:table-cell office:value-type="float" office:value="25.99155" table:style-name="ce2">
            <text:p>25.99155</text:p>
          </table:table-cell>
          <table:table-cell office:value-type="float" office:value="19.619" table:style-name="ce2">
            <text:p>19.619</text:p>
          </table:table-cell>
          <table:table-cell office:value-type="string" table:style-name="ce2">
            <text:p>Medium</text:p>
          </table:table-cell>
          <table:table-cell office:value-type="float" office:value="5.6244175507010503" table:style-name="ce2">
            <text:p>5.62441755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roydon</text:p>
          </table:table-cell>
          <table:table-cell office:value-type="float" office:value="104.9216947" table:style-name="ce2">
            <text:p>104.9216947</text:p>
          </table:table-cell>
          <table:table-cell office:value-type="float" office:value="27.367268750000001" table:style-name="ce2">
            <text:p>27.36726875</text:p>
          </table:table-cell>
          <table:table-cell office:value-type="float" office:value="26.07638" table:style-name="ce2">
            <text:p>26.07638</text:p>
          </table:table-cell>
          <table:table-cell office:value-type="float" office:value="22.477" table:style-name="ce2">
            <text:p>22.477</text:p>
          </table:table-cell>
          <table:table-cell office:value-type="string" table:style-name="ce2">
            <text:p>High</text:p>
          </table:table-cell>
          <table:table-cell office:value-type="float" office:value="2.8714202165603502" table:style-name="ce2">
            <text:p>2.8714202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slington</text:p>
          </table:table-cell>
          <table:table-cell office:value-type="float" office:value="175.61507510000001" table:style-name="ce2">
            <text:p>175.6150751</text:p>
          </table:table-cell>
          <table:table-cell office:value-type="float" office:value="70.114426739999999" table:style-name="ce2">
            <text:p>70.11442674</text:p>
          </table:table-cell>
          <table:table-cell office:value-type="float" office:value="26.077999999999999" table:style-name="ce2">
            <text:p>26.078</text:p>
          </table:table-cell>
          <table:table-cell office:value-type="float" office:value="27.535" table:style-name="ce2">
            <text:p>27.535</text:p>
          </table:table-cell>
          <table:table-cell office:value-type="string" table:style-name="ce2">
            <text:p>High</text:p>
          </table:table-cell>
          <table:table-cell office:value-type="float" office:value="12.3131503175386" table:style-name="ce2">
            <text:p>12.3131503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lihull</text:p>
          </table:table-cell>
          <table:table-cell office:value-type="float" office:value="297.87910890000001" table:style-name="ce2">
            <text:p>297.8791089</text:p>
          </table:table-cell>
          <table:table-cell office:value-type="float" office:value="82.418148479999999" table:style-name="ce2">
            <text:p>82.41814848</text:p>
          </table:table-cell>
          <table:table-cell office:value-type="float" office:value="26.142759999999999" table:style-name="ce2">
            <text:p>26.14276</text:p>
          </table:table-cell>
          <table:table-cell office:value-type="float" office:value="17.37" table:style-name="ce2">
            <text:p>17.37</text:p>
          </table:table-cell>
          <table:table-cell office:value-type="string" table:style-name="ce2">
            <text:p>Medium</text:p>
          </table:table-cell>
          <table:table-cell office:value-type="float" office:value="24.5506446264103" table:style-name="ce2">
            <text:p>24.550644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eeds</text:p>
          </table:table-cell>
          <table:table-cell office:value-type="float" office:value="154.3081492" table:style-name="ce2">
            <text:p>154.3081492</text:p>
          </table:table-cell>
          <table:table-cell office:value-type="float" office:value="37.327789680000002" table:style-name="ce2">
            <text:p>37.32778968</text:p>
          </table:table-cell>
          <table:table-cell office:value-type="float" office:value="26.154589999999999" table:style-name="ce2">
            <text:p>26.15459</text:p>
          </table:table-cell>
          <table:table-cell office:value-type="float" office:value="27.300999999999998" table:style-name="ce2">
            <text:p>27.301</text:p>
          </table:table-cell>
          <table:table-cell office:value-type="string" table:style-name="ce2">
            <text:p>High</text:p>
          </table:table-cell>
          <table:table-cell office:value-type="float" office:value="5.7599821392476596" table:style-name="ce2">
            <text:p>5.75998213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uth Gloucestershire</text:p>
          </table:table-cell>
          <table:table-cell office:value-type="float" office:value="476.55201720000002" table:style-name="ce2">
            <text:p>476.5520172</text:p>
          </table:table-cell>
          <table:table-cell office:value-type="float" office:value="81.556755350000003" table:style-name="ce2">
            <text:p>81.55675535</text:p>
          </table:table-cell>
          <table:table-cell office:value-type="float" office:value="26.17051" table:style-name="ce2">
            <text:p>26.17051</text:p>
          </table:table-cell>
          <table:table-cell office:value-type="float" office:value="11.66" table:style-name="ce2">
            <text:p>11.66</text:p>
          </table:table-cell>
          <table:table-cell office:value-type="string" table:style-name="ce2">
            <text:p>Medium</text:p>
          </table:table-cell>
          <table:table-cell office:value-type="float" office:value="38.866036278329403" table:style-name="ce2">
            <text:p>38.8660362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lderdale</text:p>
          </table:table-cell>
          <table:table-cell office:value-type="float" office:value="202.60396879999999" table:style-name="ce2">
            <text:p>202.6039688</text:p>
          </table:table-cell>
          <table:table-cell office:value-type="float" office:value="55.549383400000004" table:style-name="ce2">
            <text:p>55.5493834</text:p>
          </table:table-cell>
          <table:table-cell office:value-type="float" office:value="26.21547" table:style-name="ce2">
            <text:p>26.21547</text:p>
          </table:table-cell>
          <table:table-cell office:value-type="float" office:value="26.350999999999999" table:style-name="ce2">
            <text:p>26.351</text:p>
          </table:table-cell>
          <table:table-cell office:value-type="string" table:style-name="ce2">
            <text:p>High</text:p>
          </table:table-cell>
          <table:table-cell office:value-type="float" office:value="11.2545255412328" table:style-name="ce2">
            <text:p>11.2545255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elford and Wrekin</text:p>
          </table:table-cell>
          <table:table-cell office:value-type="float" office:value="169.05716699999999" table:style-name="ce2">
            <text:p>169.057167</text:p>
          </table:table-cell>
          <table:table-cell office:value-type="float" office:value="69.663756269999993" table:style-name="ce2">
            <text:p>69.66375627</text:p>
          </table:table-cell>
          <table:table-cell office:value-type="float" office:value="26.25666" table:style-name="ce2">
            <text:p>26.25666</text:p>
          </table:table-cell>
          <table:table-cell office:value-type="float" office:value="24.988" table:style-name="ce2">
            <text:p>24.988</text:p>
          </table:table-cell>
          <table:table-cell office:value-type="string" table:style-name="ce2">
            <text:p>High</text:p>
          </table:table-cell>
          <table:table-cell office:value-type="float" office:value="11.777157277584701" table:style-name="ce2">
            <text:p>11.7771572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ury</text:p>
          </table:table-cell>
          <table:table-cell office:value-type="float" office:value="255.94832880000001" table:style-name="ce2">
            <text:p>255.9483288</text:p>
          </table:table-cell>
          <table:table-cell office:value-type="float" office:value="68.236096900000007" table:style-name="ce2">
            <text:p>68.2360969</text:p>
          </table:table-cell>
          <table:table-cell office:value-type="float" office:value="26.274840000000001" table:style-name="ce2">
            <text:p>26.27484</text:p>
          </table:table-cell>
          <table:table-cell office:value-type="float" office:value="23.681999999999999" table:style-name="ce2">
            <text:p>23.682</text:p>
          </table:table-cell>
          <table:table-cell office:value-type="string" table:style-name="ce2">
            <text:p>High</text:p>
          </table:table-cell>
          <table:table-cell office:value-type="float" office:value="17.464914965389902" table:style-name="ce2">
            <text:p>17.4649149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ancashire</text:p>
          </table:table-cell>
          <table:table-cell office:value-type="float" office:value="308.34047459999999" table:style-name="ce2">
            <text:p>308.3404746</text:p>
          </table:table-cell>
          <table:table-cell office:value-type="float" office:value="87.860766069999997" table:style-name="ce2">
            <text:p>87.86076607</text:p>
          </table:table-cell>
          <table:table-cell office:value-type="float" office:value="26.32442" table:style-name="ce2">
            <text:p>26.32442</text:p>
          </table:table-cell>
          <table:table-cell office:value-type="float" office:value="23.443000000000001" table:style-name="ce2">
            <text:p>23.443</text:p>
          </table:table-cell>
          <table:table-cell office:value-type="string" table:style-name="ce2">
            <text:p>High</text:p>
          </table:table-cell>
          <table:table-cell office:value-type="float" office:value="27.091030308743399" table:style-name="ce2">
            <text:p>27.0910303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Northamptonshire</text:p>
          </table:table-cell>
          <table:table-cell office:value-type="float" office:value="273.57056679999999" table:style-name="ce2">
            <text:p>273.5705668</text:p>
          </table:table-cell>
          <table:table-cell office:value-type="float" office:value="73.895265780000003" table:style-name="ce2">
            <text:p>73.89526578</text:p>
          </table:table-cell>
          <table:table-cell office:value-type="float" office:value="26.411339999999999" table:style-name="ce2">
            <text:p>26.41134</text:p>
          </table:table-cell>
          <table:table-cell office:value-type="float" office:value="19.656869277164699" table:style-name="ce2">
            <text:p>19.65686928</text:p>
          </table:table-cell>
          <table:table-cell office:value-type="string" table:style-name="ce2">
            <text:p>Medium</text:p>
          </table:table-cell>
          <table:table-cell office:value-type="float" office:value="20.2155697432712" table:style-name="ce2">
            <text:p>20.2155697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erefordshire</text:p>
          </table:table-cell>
          <table:table-cell office:value-type="float" office:value="395.20283460000002" table:style-name="ce2">
            <text:p>395.2028346</text:p>
          </table:table-cell>
          <table:table-cell office:value-type="float" office:value="220.2513802" table:style-name="ce2">
            <text:p>220.2513802</text:p>
          </table:table-cell>
          <table:table-cell office:value-type="float" office:value="26.42051" table:style-name="ce2">
            <text:p>26.42051</text:p>
          </table:table-cell>
          <table:table-cell office:value-type="float" office:value="18.89" table:style-name="ce2">
            <text:p>18.89</text:p>
          </table:table-cell>
          <table:table-cell office:value-type="string" table:style-name="ce2">
            <text:p>Medium</text:p>
          </table:table-cell>
          <table:table-cell office:value-type="float" office:value="87.043969779602307" table:style-name="ce2">
            <text:p>87.043969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rwickshire</text:p>
          </table:table-cell>
          <table:table-cell office:value-type="float" office:value="304.26249239999999" table:style-name="ce2">
            <text:p>304.2624924</text:p>
          </table:table-cell>
          <table:table-cell office:value-type="float" office:value="75.766638749999998" table:style-name="ce2">
            <text:p>75.76663875</text:p>
          </table:table-cell>
          <table:table-cell office:value-type="float" office:value="26.440919999999998" table:style-name="ce2">
            <text:p>26.44092</text:p>
          </table:table-cell>
          <table:table-cell office:value-type="float" office:value="15.64" table:style-name="ce2">
            <text:p>15.64</text:p>
          </table:table-cell>
          <table:table-cell office:value-type="string" table:style-name="ce2">
            <text:p>Medium</text:p>
          </table:table-cell>
          <table:table-cell office:value-type="float" office:value="23.052946346845399" table:style-name="ce2">
            <text:p>23.052946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rby</text:p>
          </table:table-cell>
          <table:table-cell office:value-type="float" office:value="180.61933780000001" table:style-name="ce2">
            <text:p>180.6193378</text:p>
          </table:table-cell>
          <table:table-cell office:value-type="float" office:value="58.276998900000002" table:style-name="ce2">
            <text:p>58.2769989</text:p>
          </table:table-cell>
          <table:table-cell office:value-type="float" office:value="26.48602" table:style-name="ce2">
            <text:p>26.48602</text:p>
          </table:table-cell>
          <table:table-cell office:value-type="float" office:value="26.323" table:style-name="ce2">
            <text:p>26.323</text:p>
          </table:table-cell>
          <table:table-cell office:value-type="string" table:style-name="ce2">
            <text:p>High</text:p>
          </table:table-cell>
          <table:table-cell office:value-type="float" office:value="10.5259529502893" table:style-name="ce2">
            <text:p>10.525952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mden</text:p>
          </table:table-cell>
          <table:table-cell office:value-type="float" office:value="121.0167695" table:style-name="ce2">
            <text:p>121.0167695</text:p>
          </table:table-cell>
          <table:table-cell office:value-type="float" office:value="110.21712770000001" table:style-name="ce2">
            <text:p>110.2171277</text:p>
          </table:table-cell>
          <table:table-cell office:value-type="float" office:value="26.492069999999998" table:style-name="ce2">
            <text:p>26.49207</text:p>
          </table:table-cell>
          <table:table-cell office:value-type="float" office:value="20.131" table:style-name="ce2">
            <text:p>20.131</text:p>
          </table:table-cell>
          <table:table-cell office:value-type="string" table:style-name="ce2">
            <text:p>High</text:p>
          </table:table-cell>
          <table:table-cell office:value-type="float" office:value="13.338120737822999" table:style-name="ce2">
            <text:p>13.3381207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xfordshire</text:p>
          </table:table-cell>
          <table:table-cell office:value-type="float" office:value="209.85428329999999" table:style-name="ce2">
            <text:p>209.8542833</text:p>
          </table:table-cell>
          <table:table-cell office:value-type="float" office:value="55.735877510000002" table:style-name="ce2">
            <text:p>55.73587751</text:p>
          </table:table-cell>
          <table:table-cell office:value-type="float" office:value="26.66442" table:style-name="ce2">
            <text:p>26.66442</text:p>
          </table:table-cell>
          <table:table-cell office:value-type="float" office:value="11.656000000000001" table:style-name="ce2">
            <text:p>11.656</text:p>
          </table:table-cell>
          <table:table-cell office:value-type="string" table:style-name="ce2">
            <text:p>Medium</text:p>
          </table:table-cell>
          <table:table-cell office:value-type="float" office:value="11.696412628957599" table:style-name="ce2">
            <text:p>11.696412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ast Riding of Yorkshire</text:p>
          </table:table-cell>
          <table:table-cell office:value-type="float" office:value="212.55370020000001" table:style-name="ce2">
            <text:p>212.5537002</text:p>
          </table:table-cell>
          <table:table-cell office:value-type="float" office:value="104.4864891" table:style-name="ce2">
            <text:p>104.4864891</text:p>
          </table:table-cell>
          <table:table-cell office:value-type="float" office:value="26.764279999999999" table:style-name="ce2">
            <text:p>26.76428</text:p>
          </table:table-cell>
          <table:table-cell office:value-type="float" office:value="15.605" table:style-name="ce2">
            <text:p>15.605</text:p>
          </table:table-cell>
          <table:table-cell office:value-type="string" table:style-name="ce2">
            <text:p>Medium</text:p>
          </table:table-cell>
          <table:table-cell office:value-type="float" office:value="22.208989879112" table:style-name="ce2">
            <text:p>22.208989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ent</text:p>
          </table:table-cell>
          <table:table-cell office:value-type="float" office:value="231.2294756" table:style-name="ce2">
            <text:p>231.2294756</text:p>
          </table:table-cell>
          <table:table-cell office:value-type="float" office:value="76.076846230000001" table:style-name="ce2">
            <text:p>76.07684623</text:p>
          </table:table-cell>
          <table:table-cell office:value-type="float" office:value="26.768879999999999" table:style-name="ce2">
            <text:p>26.76888</text:p>
          </table:table-cell>
          <table:table-cell office:value-type="float" office:value="19.538" table:style-name="ce2">
            <text:p>19.538</text:p>
          </table:table-cell>
          <table:table-cell office:value-type="string" table:style-name="ce2">
            <text:p>Medium</text:p>
          </table:table-cell>
          <table:table-cell office:value-type="float" office:value="17.591209259064701" table:style-name="ce2">
            <text:p>17.591209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hropshire</text:p>
          </table:table-cell>
          <table:table-cell office:value-type="float" office:value="129.9432199" table:style-name="ce2">
            <text:p>129.9432199</text:p>
          </table:table-cell>
          <table:table-cell office:value-type="float" office:value="50.511002980000001" table:style-name="ce2">
            <text:p>50.51100298</text:p>
          </table:table-cell>
          <table:table-cell office:value-type="float" office:value="26.771560000000001" table:style-name="ce2">
            <text:p>26.77156</text:p>
          </table:table-cell>
          <table:table-cell office:value-type="float" office:value="17.152999999999999" table:style-name="ce2">
            <text:p>17.153</text:p>
          </table:table-cell>
          <table:table-cell office:value-type="string" table:style-name="ce2">
            <text:p>Medium</text:p>
          </table:table-cell>
          <table:table-cell office:value-type="float" office:value="6.5635623675997001" table:style-name="ce2">
            <text:p>6.56356236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irral</text:p>
          </table:table-cell>
          <table:table-cell office:value-type="float" office:value="252.05615349999999" table:style-name="ce2">
            <text:p>252.0561535</text:p>
          </table:table-cell>
          <table:table-cell office:value-type="float" office:value="174.57305500000001" table:style-name="ce2">
            <text:p>174.573055</text:p>
          </table:table-cell>
          <table:table-cell office:value-type="float" office:value="26.849740000000001" table:style-name="ce2">
            <text:p>26.84974</text:p>
          </table:table-cell>
          <table:table-cell office:value-type="float" office:value="29.588999999999999" table:style-name="ce2">
            <text:p>29.589</text:p>
          </table:table-cell>
          <table:table-cell office:value-type="string" table:style-name="ce2">
            <text:p>High</text:p>
          </table:table-cell>
          <table:table-cell office:value-type="float" office:value="44.002212748043902" table:style-name="ce2">
            <text:p>44.002212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umberland</text:p>
          </table:table-cell>
          <table:table-cell office:value-type="float" office:value="348.01901179999999" table:style-name="ce2">
            <text:p>348.0190118</text:p>
          </table:table-cell>
          <table:table-cell office:value-type="float" office:value="115.8860454" table:style-name="ce2">
            <text:p>115.8860454</text:p>
          </table:table-cell>
          <table:table-cell office:value-type="float" office:value="26.896149999999999" table:style-name="ce2">
            <text:p>26.89615</text:p>
          </table:table-cell>
          <table:table-cell office:value-type="float" office:value="23.09" table:style-name="ce2">
            <text:p>23.09</text:p>
          </table:table-cell>
          <table:table-cell office:value-type="string" table:style-name="ce2">
            <text:p>High</text:p>
          </table:table-cell>
          <table:table-cell office:value-type="float" office:value="40.3305470015179" table:style-name="ce2">
            <text:p>40.33054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orset</text:p>
          </table:table-cell>
          <table:table-cell office:value-type="float" office:value="543.0650875" table:style-name="ce2">
            <text:p>543.0650875</text:p>
          </table:table-cell>
          <table:table-cell office:value-type="float" office:value="90.878797980000002" table:style-name="ce2">
            <text:p>90.87879798</text:p>
          </table:table-cell>
          <table:table-cell office:value-type="float" office:value="26.90502" table:style-name="ce2">
            <text:p>26.90502</text:p>
          </table:table-cell>
          <table:table-cell office:value-type="float" office:value="15.734999999999999" table:style-name="ce2">
            <text:p>15.735</text:p>
          </table:table-cell>
          <table:table-cell office:value-type="string" table:style-name="ce2">
            <text:p>Medium</text:p>
          </table:table-cell>
          <table:table-cell office:value-type="float" office:value="49.3531023769035" table:style-name="ce2">
            <text:p>49.353102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. Helens</text:p>
          </table:table-cell>
          <table:table-cell office:value-type="float" office:value="674.13937940000005" table:style-name="ce2">
            <text:p>674.1393794</text:p>
          </table:table-cell>
          <table:table-cell office:value-type="float" office:value="94.32182607" table:style-name="ce2">
            <text:p>94.32182607</text:p>
          </table:table-cell>
          <table:table-cell office:value-type="float" office:value="26.975709999999999" table:style-name="ce2">
            <text:p>26.97571</text:p>
          </table:table-cell>
          <table:table-cell office:value-type="float" office:value="31.518000000000001" table:style-name="ce2">
            <text:p>31.518</text:p>
          </table:table-cell>
          <table:table-cell office:value-type="string" table:style-name="ce2">
            <text:p>High</text:p>
          </table:table-cell>
          <table:table-cell office:value-type="float" office:value="63.586057290704503" table:style-name="ce2">
            <text:p>63.5860572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arlington</text:p>
          </table:table-cell>
          <table:table-cell office:value-type="float" office:value="382.07297340000002" table:style-name="ce2">
            <text:p>382.0729734</text:p>
          </table:table-cell>
          <table:table-cell office:value-type="float" office:value="200.79425280000001" table:style-name="ce2">
            <text:p>200.7942528</text:p>
          </table:table-cell>
          <table:table-cell office:value-type="float" office:value="27.16892" table:style-name="ce2">
            <text:p>27.16892</text:p>
          </table:table-cell>
          <table:table-cell office:value-type="float" office:value="25.657" table:style-name="ce2">
            <text:p>25.657</text:p>
          </table:table-cell>
          <table:table-cell office:value-type="string" table:style-name="ce2">
            <text:p>High</text:p>
          </table:table-cell>
          <table:table-cell office:value-type="float" office:value="76.718057208927306" table:style-name="ce2">
            <text:p>76.7180572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irmingham</text:p>
          </table:table-cell>
          <table:table-cell office:value-type="float" office:value="196.32020009999999" table:style-name="ce2">
            <text:p>196.3202001</text:p>
          </table:table-cell>
          <table:table-cell office:value-type="float" office:value="81.179766549999997" table:style-name="ce2">
            <text:p>81.17976655</text:p>
          </table:table-cell>
          <table:table-cell office:value-type="float" office:value="27.228380000000001" table:style-name="ce2">
            <text:p>27.22838</text:p>
          </table:table-cell>
          <table:table-cell office:value-type="float" office:value="38.067" table:style-name="ce2">
            <text:p>38.067</text:p>
          </table:table-cell>
          <table:table-cell office:value-type="string" table:style-name="ce2">
            <text:p>High</text:p>
          </table:table-cell>
          <table:table-cell office:value-type="float" office:value="15.937228013167299" table:style-name="ce2">
            <text:p>15.937228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Somerset</text:p>
          </table:table-cell>
          <table:table-cell office:value-type="float" office:value="632.95680660000005" table:style-name="ce2">
            <text:p>632.9568066</text:p>
          </table:table-cell>
          <table:table-cell office:value-type="float" office:value="376.07694759999998" table:style-name="ce2">
            <text:p>376.0769476</text:p>
          </table:table-cell>
          <table:table-cell office:value-type="float" office:value="27.236460000000001" table:style-name="ce2">
            <text:p>27.23646</text:p>
          </table:table-cell>
          <table:table-cell office:value-type="float" office:value="15.824999999999999" table:style-name="ce2">
            <text:p>15.825</text:p>
          </table:table-cell>
          <table:table-cell office:value-type="string" table:style-name="ce2">
            <text:p>Medium</text:p>
          </table:table-cell>
          <table:table-cell office:value-type="float" office:value="238.040463788772" table:style-name="ce2">
            <text:p>238.0404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ttingham</text:p>
          </table:table-cell>
          <table:table-cell office:value-type="float" office:value="161.3479428" table:style-name="ce2">
            <text:p>161.3479428</text:p>
          </table:table-cell>
          <table:table-cell office:value-type="float" office:value="103.6806636" table:style-name="ce2">
            <text:p>103.6806636</text:p>
          </table:table-cell>
          <table:table-cell office:value-type="float" office:value="27.244289999999999" table:style-name="ce2">
            <text:p>27.24429</text:p>
          </table:table-cell>
          <table:table-cell office:value-type="float" office:value="34.890999999999998" table:style-name="ce2">
            <text:p>34.891</text:p>
          </table:table-cell>
          <table:table-cell office:value-type="string" table:style-name="ce2">
            <text:p>High</text:p>
          </table:table-cell>
          <table:table-cell office:value-type="float" office:value="16.728661779998799" table:style-name="ce2">
            <text:p>16.728661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lackburn with Darwen</text:p>
          </table:table-cell>
          <table:table-cell office:value-type="float" office:value="294.64721329999998" table:style-name="ce2">
            <text:p>294.6472133</text:p>
          </table:table-cell>
          <table:table-cell office:value-type="float" office:value="74.275810840000005" table:style-name="ce2">
            <text:p>74.27581084</text:p>
          </table:table-cell>
          <table:table-cell office:value-type="float" office:value="27.24625" table:style-name="ce2">
            <text:p>27.24625</text:p>
          </table:table-cell>
          <table:table-cell office:value-type="float" office:value="36.012999999999998" table:style-name="ce2">
            <text:p>36.013</text:p>
          </table:table-cell>
          <table:table-cell office:value-type="string" table:style-name="ce2">
            <text:p>High</text:p>
          </table:table-cell>
          <table:table-cell office:value-type="float" office:value="21.885160679603899" table:style-name="ce2">
            <text:p>21.8851606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andwell</text:p>
          </table:table-cell>
          <table:table-cell office:value-type="float" office:value="192.29555429999999" table:style-name="ce2">
            <text:p>192.2955543</text:p>
          </table:table-cell>
          <table:table-cell office:value-type="float" office:value="74.854609319999994" table:style-name="ce2">
            <text:p>74.85460932</text:p>
          </table:table-cell>
          <table:table-cell office:value-type="float" office:value="27.27347" table:style-name="ce2">
            <text:p>27.27347</text:p>
          </table:table-cell>
          <table:table-cell office:value-type="float" office:value="34.884" table:style-name="ce2">
            <text:p>34.884</text:p>
          </table:table-cell>
          <table:table-cell office:value-type="string" table:style-name="ce2">
            <text:p>High</text:p>
          </table:table-cell>
          <table:table-cell office:value-type="float" office:value="14.3942085910993" table:style-name="ce2">
            <text:p>14.3942085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ortsmouth</text:p>
          </table:table-cell>
          <table:table-cell office:value-type="float" office:value="302.84918190000002" table:style-name="ce2">
            <text:p>302.8491819</text:p>
          </table:table-cell>
          <table:table-cell office:value-type="float" office:value="94.547001679999994" table:style-name="ce2">
            <text:p>94.54700168</text:p>
          </table:table-cell>
          <table:table-cell office:value-type="float" office:value="27.27749" table:style-name="ce2">
            <text:p>27.27749</text:p>
          </table:table-cell>
          <table:table-cell office:value-type="float" office:value="26.899000000000001" table:style-name="ce2">
            <text:p>26.899</text:p>
          </table:table-cell>
          <table:table-cell office:value-type="string" table:style-name="ce2">
            <text:p>High</text:p>
          </table:table-cell>
          <table:table-cell office:value-type="float" office:value="28.6334821098859" table:style-name="ce2">
            <text:p>28.6334821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Yorkshire UA</text:p>
          </table:table-cell>
          <table:table-cell office:value-type="float" office:value="237.0273842" table:style-name="ce2">
            <text:p>237.0273842</text:p>
          </table:table-cell>
          <table:table-cell office:value-type="float" office:value="87.24328663" table:style-name="ce2">
            <text:p>87.24328663</text:p>
          </table:table-cell>
          <table:table-cell office:value-type="float" office:value="27.32377" table:style-name="ce2">
            <text:p>27.32377</text:p>
          </table:table-cell>
          <table:table-cell office:value-type="float" office:value="14.762" table:style-name="ce2">
            <text:p>14.762</text:p>
          </table:table-cell>
          <table:table-cell office:value-type="string" table:style-name="ce2">
            <text:p>Medium</text:p>
          </table:table-cell>
          <table:table-cell office:value-type="float" office:value="20.679048018919701" table:style-name="ce2">
            <text:p>20.6790480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heshire West and Chester</text:p>
          </table:table-cell>
          <table:table-cell office:value-type="float" office:value="341.34337959999999" table:style-name="ce2">
            <text:p>341.3433796</text:p>
          </table:table-cell>
          <table:table-cell office:value-type="float" office:value="77.594842060000005" table:style-name="ce2">
            <text:p>77.59484206</text:p>
          </table:table-cell>
          <table:table-cell office:value-type="float" office:value="27.415970000000002" table:style-name="ce2">
            <text:p>27.41597</text:p>
          </table:table-cell>
          <table:table-cell office:value-type="float" office:value="18.082999999999998" table:style-name="ce2">
            <text:p>18.083</text:p>
          </table:table-cell>
          <table:table-cell office:value-type="string" table:style-name="ce2">
            <text:p>Medium</text:p>
          </table:table-cell>
          <table:table-cell office:value-type="float" office:value="26.486485628288602" table:style-name="ce2">
            <text:p>26.486485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otherham</text:p>
          </table:table-cell>
          <table:table-cell office:value-type="float" office:value="167.85693620000001" table:style-name="ce2">
            <text:p>167.8569362</text:p>
          </table:table-cell>
          <table:table-cell office:value-type="float" office:value="68.851556049999999" table:style-name="ce2">
            <text:p>68.85155605</text:p>
          </table:table-cell>
          <table:table-cell office:value-type="float" office:value="27.479289999999999" table:style-name="ce2">
            <text:p>27.47929</text:p>
          </table:table-cell>
          <table:table-cell office:value-type="float" office:value="29.55" table:style-name="ce2">
            <text:p>29.55</text:p>
          </table:table-cell>
          <table:table-cell office:value-type="string" table:style-name="ce2">
            <text:p>High</text:p>
          </table:table-cell>
          <table:table-cell office:value-type="float" office:value="11.5572112511556" table:style-name="ce2">
            <text:p>11.557211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oncaster</text:p>
          </table:table-cell>
          <table:table-cell office:value-type="float" office:value="340.77178199999997" table:style-name="ce2">
            <text:p>340.771782</text:p>
          </table:table-cell>
          <table:table-cell office:value-type="float" office:value="52.841355149999998" table:style-name="ce2">
            <text:p>52.84135515</text:p>
          </table:table-cell>
          <table:table-cell office:value-type="float" office:value="27.545269999999999" table:style-name="ce2">
            <text:p>27.54527</text:p>
          </table:table-cell>
          <table:table-cell office:value-type="float" office:value="30.289000000000001" table:style-name="ce2">
            <text:p>30.289</text:p>
          </table:table-cell>
          <table:table-cell office:value-type="string" table:style-name="ce2">
            <text:p>High</text:p>
          </table:table-cell>
          <table:table-cell office:value-type="float" office:value="18.006842757760399" table:style-name="ce2">
            <text:p>18.0068427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dcar and Cleveland</text:p>
          </table:table-cell>
          <table:table-cell office:value-type="float" office:value="480.54163190000003" table:style-name="ce2">
            <text:p>480.5416319</text:p>
          </table:table-cell>
          <table:table-cell office:value-type="float" office:value="109.32546189999999" table:style-name="ce2">
            <text:p>109.3254619</text:p>
          </table:table-cell>
          <table:table-cell office:value-type="float" office:value="27.621359999999999" table:style-name="ce2">
            <text:p>27.62136</text:p>
          </table:table-cell>
          <table:table-cell office:value-type="float" office:value="29.792000000000002" table:style-name="ce2">
            <text:p>29.792</text:p>
          </table:table-cell>
          <table:table-cell office:value-type="string" table:style-name="ce2">
            <text:p>High</text:p>
          </table:table-cell>
          <table:table-cell office:value-type="float" office:value="52.535435869647301" table:style-name="ce2">
            <text:p>52.5354358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ffolk</text:p>
          </table:table-cell>
          <table:table-cell office:value-type="float" office:value="361.59838760000002" table:style-name="ce2">
            <text:p>361.5983876</text:p>
          </table:table-cell>
          <table:table-cell office:value-type="float" office:value="93.111727419999994" table:style-name="ce2">
            <text:p>93.11172742</text:p>
          </table:table-cell>
          <table:table-cell office:value-type="float" office:value="27.658200000000001" table:style-name="ce2">
            <text:p>27.6582</text:p>
          </table:table-cell>
          <table:table-cell office:value-type="float" office:value="18.46" table:style-name="ce2">
            <text:p>18.46</text:p>
          </table:table-cell>
          <table:table-cell office:value-type="string" table:style-name="ce2">
            <text:p>Medium</text:p>
          </table:table-cell>
          <table:table-cell office:value-type="float" office:value="33.669050501722701" table:style-name="ce2">
            <text:p>33.66905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uth Tyneside</text:p>
          </table:table-cell>
          <table:table-cell office:value-type="float" office:value="355.6327392" table:style-name="ce2">
            <text:p>355.6327392</text:p>
          </table:table-cell>
          <table:table-cell office:value-type="float" office:value="83.067517280000004" table:style-name="ce2">
            <text:p>83.06751728</text:p>
          </table:table-cell>
          <table:table-cell office:value-type="float" office:value="27.66478" table:style-name="ce2">
            <text:p>27.66478</text:p>
          </table:table-cell>
          <table:table-cell office:value-type="float" office:value="31.509" table:style-name="ce2">
            <text:p>31.509</text:p>
          </table:table-cell>
          <table:table-cell office:value-type="string" table:style-name="ce2">
            <text:p>High</text:p>
          </table:table-cell>
          <table:table-cell office:value-type="float" office:value="29.541528708829699" table:style-name="ce2">
            <text:p>29.5415287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ateshead</text:p>
          </table:table-cell>
          <table:table-cell office:value-type="float" office:value="412.2016165" table:style-name="ce2">
            <text:p>412.2016165</text:p>
          </table:table-cell>
          <table:table-cell office:value-type="float" office:value="87.975065349999994" table:style-name="ce2">
            <text:p>87.97506535</text:p>
          </table:table-cell>
          <table:table-cell office:value-type="float" office:value="27.7547" table:style-name="ce2">
            <text:p>27.7547</text:p>
          </table:table-cell>
          <table:table-cell office:value-type="float" office:value="28.216999999999999" table:style-name="ce2">
            <text:p>28.217</text:p>
          </table:table-cell>
          <table:table-cell office:value-type="string" table:style-name="ce2">
            <text:p>High</text:p>
          </table:table-cell>
          <table:table-cell office:value-type="float" office:value="36.263464148963102" table:style-name="ce2">
            <text:p>36.263464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incolnshire</text:p>
          </table:table-cell>
          <table:table-cell office:value-type="float" office:value="252.24258520000001" table:style-name="ce2">
            <text:p>252.2425852</text:p>
          </table:table-cell>
          <table:table-cell office:value-type="float" office:value="74.702886250000006" table:style-name="ce2">
            <text:p>74.70288625</text:p>
          </table:table-cell>
          <table:table-cell office:value-type="float" office:value="27.855229999999999" table:style-name="ce2">
            <text:p>27.85523</text:p>
          </table:table-cell>
          <table:table-cell office:value-type="float" office:value="20.29" table:style-name="ce2">
            <text:p>20.29</text:p>
          </table:table-cell>
          <table:table-cell office:value-type="string" table:style-name="ce2">
            <text:p>High</text:p>
          </table:table-cell>
          <table:table-cell office:value-type="float" office:value="18.843249149601501" table:style-name="ce2">
            <text:p>18.843249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Lincolnshire</text:p>
          </table:table-cell>
          <table:table-cell office:value-type="float" office:value="177.07160529999999" table:style-name="ce2">
            <text:p>177.0716053</text:p>
          </table:table-cell>
          <table:table-cell office:value-type="float" office:value="72.782322629999996" table:style-name="ce2">
            <text:p>72.78232263</text:p>
          </table:table-cell>
          <table:table-cell office:value-type="float" office:value="27.948689999999999" table:style-name="ce2">
            <text:p>27.94869</text:p>
          </table:table-cell>
          <table:table-cell office:value-type="float" office:value="22.096" table:style-name="ce2">
            <text:p>22.096</text:p>
          </table:table-cell>
          <table:table-cell office:value-type="string" table:style-name="ce2">
            <text:p>High</text:p>
          </table:table-cell>
          <table:table-cell office:value-type="float" office:value="12.8876827055566" table:style-name="ce2">
            <text:p>12.8876827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heffield</text:p>
          </table:table-cell>
          <table:table-cell office:value-type="float" office:value="224.87903729999999" table:style-name="ce2">
            <text:p>224.8790373</text:p>
          </table:table-cell>
          <table:table-cell office:value-type="float" office:value="83.125519530000005" table:style-name="ce2">
            <text:p>83.12551953</text:p>
          </table:table-cell>
          <table:table-cell office:value-type="float" office:value="27.983440000000002" table:style-name="ce2">
            <text:p>27.98344</text:p>
          </table:table-cell>
          <table:table-cell office:value-type="float" office:value="27.06" table:style-name="ce2">
            <text:p>27.06</text:p>
          </table:table-cell>
          <table:table-cell office:value-type="string" table:style-name="ce2">
            <text:p>High</text:p>
          </table:table-cell>
          <table:table-cell office:value-type="float" office:value="18.693186806968701" table:style-name="ce2">
            <text:p>18.6931868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folk</text:p>
          </table:table-cell>
          <table:table-cell office:value-type="float" office:value="301.07431320000001" table:style-name="ce2">
            <text:p>301.0743132</text:p>
          </table:table-cell>
          <table:table-cell office:value-type="float" office:value="85.311681820000004" table:style-name="ce2">
            <text:p>85.31168182</text:p>
          </table:table-cell>
          <table:table-cell office:value-type="float" office:value="28.252400000000002" table:style-name="ce2">
            <text:p>28.2524</text:p>
          </table:table-cell>
          <table:table-cell office:value-type="float" office:value="21.183" table:style-name="ce2">
            <text:p>21.183</text:p>
          </table:table-cell>
          <table:table-cell office:value-type="string" table:style-name="ce2">
            <text:p>High</text:p>
          </table:table-cell>
          <table:table-cell office:value-type="float" office:value="25.685156011893401" table:style-name="ce2">
            <text:p>25.685156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ewcastle upon Tyne</text:p>
          </table:table-cell>
          <table:table-cell office:value-type="float" office:value="382.95930820000001" table:style-name="ce2">
            <text:p>382.9593082</text:p>
          </table:table-cell>
          <table:table-cell office:value-type="float" office:value="66.571247880000001" table:style-name="ce2">
            <text:p>66.57124788</text:p>
          </table:table-cell>
          <table:table-cell office:value-type="float" office:value="28.522500000000001" table:style-name="ce2">
            <text:p>28.5225</text:p>
          </table:table-cell>
          <table:table-cell office:value-type="float" office:value="29.79" table:style-name="ce2">
            <text:p>29.79</text:p>
          </table:table-cell>
          <table:table-cell office:value-type="string" table:style-name="ce2">
            <text:p>High</text:p>
          </table:table-cell>
          <table:table-cell office:value-type="float" office:value="25.494079034135499" table:style-name="ce2">
            <text:p>25.4940790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kefield</text:p>
          </table:table-cell>
          <table:table-cell office:value-type="float" office:value="247.66177239999999" table:style-name="ce2">
            <text:p>247.6617724</text:p>
          </table:table-cell>
          <table:table-cell office:value-type="float" office:value="79.074303490000005" table:style-name="ce2">
            <text:p>79.07430349</text:p>
          </table:table-cell>
          <table:table-cell office:value-type="float" office:value="28.761330000000001" table:style-name="ce2">
            <text:p>28.76133</text:p>
          </table:table-cell>
          <table:table-cell office:value-type="float" office:value="27.306000000000001" table:style-name="ce2">
            <text:p>27.306</text:p>
          </table:table-cell>
          <table:table-cell office:value-type="string" table:style-name="ce2">
            <text:p>High</text:p>
          </table:table-cell>
          <table:table-cell office:value-type="float" office:value="19.583682153628899" table:style-name="ce2">
            <text:p>19.583682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merset UA</text:p>
          </table:table-cell>
          <table:table-cell office:value-type="float" office:value="497.05944060000002" table:style-name="ce2">
            <text:p>497.0594406</text:p>
          </table:table-cell>
          <table:table-cell office:value-type="float" office:value="107.52302779999999" table:style-name="ce2">
            <text:p>107.5230278</text:p>
          </table:table-cell>
          <table:table-cell office:value-type="float" office:value="28.773980000000002" table:style-name="ce2">
            <text:p>28.77398</text:p>
          </table:table-cell>
          <table:table-cell office:value-type="float" office:value="18.553000000000001" table:style-name="ce2">
            <text:p>18.553</text:p>
          </table:table-cell>
          <table:table-cell office:value-type="string" table:style-name="ce2">
            <text:p>Medium</text:p>
          </table:table-cell>
          <table:table-cell office:value-type="float" office:value="53.445336049886201" table:style-name="ce2">
            <text:p>53.445336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ston upon Hull</text:p>
          </table:table-cell>
          <table:table-cell office:value-type="float" office:value="331.70645839999997" table:style-name="ce2">
            <text:p>331.7064584</text:p>
          </table:table-cell>
          <table:table-cell office:value-type="float" office:value="122.7998363" table:style-name="ce2">
            <text:p>122.7998363</text:p>
          </table:table-cell>
          <table:table-cell office:value-type="float" office:value="28.99025" table:style-name="ce2">
            <text:p>28.99025</text:p>
          </table:table-cell>
          <table:table-cell office:value-type="float" office:value="40.564" table:style-name="ce2">
            <text:p>40.564</text:p>
          </table:table-cell>
          <table:table-cell office:value-type="string" table:style-name="ce2">
            <text:p>High</text:p>
          </table:table-cell>
          <table:table-cell office:value-type="float" office:value="40.733498791172799" table:style-name="ce2">
            <text:p>40.7334987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udley</text:p>
          </table:table-cell>
          <table:table-cell office:value-type="float" office:value="216.9317595" table:style-name="ce2">
            <text:p>216.9317595</text:p>
          </table:table-cell>
          <table:table-cell office:value-type="float" office:value="57.338627600000002" table:style-name="ce2">
            <text:p>57.3386276</text:p>
          </table:table-cell>
          <table:table-cell office:value-type="float" office:value="29.0489" table:style-name="ce2">
            <text:p>29.0489</text:p>
          </table:table-cell>
          <table:table-cell office:value-type="float" office:value="24.103000000000002" table:style-name="ce2">
            <text:p>24.103</text:p>
          </table:table-cell>
          <table:table-cell office:value-type="string" table:style-name="ce2">
            <text:p>High</text:p>
          </table:table-cell>
          <table:table-cell office:value-type="float" office:value="12.4385693725833" table:style-name="ce2">
            <text:p>12.4385693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uthampton</text:p>
          </table:table-cell>
          <table:table-cell office:value-type="float" office:value="484.72491609999997" table:style-name="ce2">
            <text:p>484.7249161</text:p>
          </table:table-cell>
          <table:table-cell office:value-type="float" office:value="109.1854763" table:style-name="ce2">
            <text:p>109.1854763</text:p>
          </table:table-cell>
          <table:table-cell office:value-type="float" office:value="29.206189999999999" table:style-name="ce2">
            <text:p>29.20619</text:p>
          </table:table-cell>
          <table:table-cell office:value-type="float" office:value="26.876000000000001" table:style-name="ce2">
            <text:p>26.876</text:p>
          </table:table-cell>
          <table:table-cell office:value-type="string" table:style-name="ce2">
            <text:p>High</text:p>
          </table:table-cell>
          <table:table-cell office:value-type="float" office:value="52.924920838856004" table:style-name="ce2">
            <text:p>52.9249208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sle of Wight</text:p>
          </table:table-cell>
          <table:table-cell office:value-type="float" office:value="518.119687" table:style-name="ce2">
            <text:p>518.119687</text:p>
          </table:table-cell>
          <table:table-cell office:value-type="float" office:value="106.6643912" table:style-name="ce2">
            <text:p>106.6643912</text:p>
          </table:table-cell>
          <table:table-cell office:value-type="float" office:value="29.208210000000001" table:style-name="ce2">
            <text:p>29.20821</text:p>
          </table:table-cell>
          <table:table-cell office:value-type="float" office:value="23.294" table:style-name="ce2">
            <text:p>23.294</text:p>
          </table:table-cell>
          <table:table-cell office:value-type="string" table:style-name="ce2">
            <text:p>High</text:p>
          </table:table-cell>
          <table:table-cell office:value-type="float" office:value="55.264920982589601" table:style-name="ce2">
            <text:p>55.2649209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rtlepool</text:p>
          </table:table-cell>
          <table:table-cell office:value-type="float" office:value="415.62384989999998" table:style-name="ce2">
            <text:p>415.6238499</text:p>
          </table:table-cell>
          <table:table-cell office:value-type="float" office:value="146.93637649999999" table:style-name="ce2">
            <text:p>146.9363765</text:p>
          </table:table-cell>
          <table:table-cell office:value-type="float" office:value="29.38618" table:style-name="ce2">
            <text:p>29.38618</text:p>
          </table:table-cell>
          <table:table-cell office:value-type="float" office:value="35.036999999999999" table:style-name="ce2">
            <text:p>35.037</text:p>
          </table:table-cell>
          <table:table-cell office:value-type="string" table:style-name="ce2">
            <text:p>High</text:p>
          </table:table-cell>
          <table:table-cell office:value-type="float" office:value="61.070262491285902" table:style-name="ce2">
            <text:p>61.0702624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Liverpool</text:p>
          </table:table-cell>
          <table:table-cell office:value-type="float" office:value="141.0000344" table:style-name="ce2">
            <text:p>141.0000344</text:p>
          </table:table-cell>
          <table:table-cell office:value-type="float" office:value="67.741498440000001" table:style-name="ce2">
            <text:p>67.74149844</text:p>
          </table:table-cell>
          <table:table-cell office:value-type="float" office:value="29.39997" table:style-name="ce2">
            <text:p>29.39997</text:p>
          </table:table-cell>
          <table:table-cell office:value-type="float" office:value="42.411999999999999" table:style-name="ce2">
            <text:p>42.412</text:p>
          </table:table-cell>
          <table:table-cell office:value-type="string" table:style-name="ce2">
            <text:p>High</text:p>
          </table:table-cell>
          <table:table-cell office:value-type="float" office:value="9.5515536103475505" table:style-name="ce2">
            <text:p>9.551553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alsall</text:p>
          </table:table-cell>
          <table:table-cell office:value-type="float" office:value="366.40117309999999" table:style-name="ce2">
            <text:p>366.4011731</text:p>
          </table:table-cell>
          <table:table-cell office:value-type="float" office:value="114.1031492" table:style-name="ce2">
            <text:p>114.1031492</text:p>
          </table:table-cell>
          <table:table-cell office:value-type="float" office:value="29.4663" table:style-name="ce2">
            <text:p>29.4663</text:p>
          </table:table-cell>
          <table:table-cell office:value-type="float" office:value="31.555" table:style-name="ce2">
            <text:p>31.555</text:p>
          </table:table-cell>
          <table:table-cell office:value-type="string" table:style-name="ce2">
            <text:p>High</text:p>
          </table:table-cell>
          <table:table-cell office:value-type="float" office:value="41.807527721284302" table:style-name="ce2">
            <text:p>41.8075277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ockton-on-Tees</text:p>
          </table:table-cell>
          <table:table-cell office:value-type="float" office:value="246.2078851" table:style-name="ce2">
            <text:p>246.2078851</text:p>
          </table:table-cell>
          <table:table-cell office:value-type="float" office:value="79.388481870000007" table:style-name="ce2">
            <text:p>79.38848187</text:p>
          </table:table-cell>
          <table:table-cell office:value-type="float" office:value="29.56146" table:style-name="ce2">
            <text:p>29.56146</text:p>
          </table:table-cell>
          <table:table-cell office:value-type="float" office:value="25.79" table:style-name="ce2">
            <text:p>25.79</text:p>
          </table:table-cell>
          <table:table-cell office:value-type="string" table:style-name="ce2">
            <text:p>High</text:p>
          </table:table-cell>
          <table:table-cell office:value-type="float" office:value="19.546070222512402" table:style-name="ce2">
            <text:p>19.5460702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unty Durham</text:p>
          </table:table-cell>
          <table:table-cell office:value-type="float" office:value="206.21330209999999" table:style-name="ce2">
            <text:p>206.2133021</text:p>
          </table:table-cell>
          <table:table-cell office:value-type="float" office:value="90.335143380000005" table:style-name="ce2">
            <text:p>90.33514338</text:p>
          </table:table-cell>
          <table:table-cell office:value-type="float" office:value="29.587150000000001" table:style-name="ce2">
            <text:p>29.58715</text:p>
          </table:table-cell>
          <table:table-cell office:value-type="float" office:value="26.792999999999999" table:style-name="ce2">
            <text:p>26.793</text:p>
          </table:table-cell>
          <table:table-cell office:value-type="string" table:style-name="ce2">
            <text:p>High</text:p>
          </table:table-cell>
          <table:table-cell office:value-type="float" office:value="18.628308212066798" table:style-name="ce2">
            <text:p>18.6283082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alford</text:p>
          </table:table-cell>
          <table:table-cell office:value-type="float" office:value="180.45399570000001" table:style-name="ce2">
            <text:p>180.4539957</text:p>
          </table:table-cell>
          <table:table-cell office:value-type="float" office:value="40.735188690000001" table:style-name="ce2">
            <text:p>40.73518869</text:p>
          </table:table-cell>
          <table:table-cell office:value-type="float" office:value="29.61243" table:style-name="ce2">
            <text:p>29.61243</text:p>
          </table:table-cell>
          <table:table-cell office:value-type="float" office:value="34.21" table:style-name="ce2">
            <text:p>34.21</text:p>
          </table:table-cell>
          <table:table-cell office:value-type="string" table:style-name="ce2">
            <text:p>High</text:p>
          </table:table-cell>
          <table:table-cell office:value-type="float" office:value="7.35082756470395" table:style-name="ce2">
            <text:p>7.3508275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von</text:p>
          </table:table-cell>
          <table:table-cell office:value-type="float" office:value="448.13854739999999" table:style-name="ce2">
            <text:p>448.1385474</text:p>
          </table:table-cell>
          <table:table-cell office:value-type="float" office:value="156.13014469999999" table:style-name="ce2">
            <text:p>156.1301447</text:p>
          </table:table-cell>
          <table:table-cell office:value-type="float" office:value="29.676909999999999" table:style-name="ce2">
            <text:p>29.67691</text:p>
          </table:table-cell>
          <table:table-cell office:value-type="float" office:value="16.606999999999999" table:style-name="ce2">
            <text:p>16.607</text:p>
          </table:table-cell>
          <table:table-cell office:value-type="string" table:style-name="ce2">
            <text:p>Medium</text:p>
          </table:table-cell>
          <table:table-cell office:value-type="float" office:value="69.967936251209807" table:style-name="ce2">
            <text:p>69.967936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rnsley</text:p>
          </table:table-cell>
          <table:table-cell office:value-type="float" office:value="486.02855090000003" table:style-name="ce2">
            <text:p>486.0285509</text:p>
          </table:table-cell>
          <table:table-cell office:value-type="float" office:value="68.564264309999999" table:style-name="ce2">
            <text:p>68.56426431</text:p>
          </table:table-cell>
          <table:table-cell office:value-type="float" office:value="29.679549999999999" table:style-name="ce2">
            <text:p>29.67955</text:p>
          </table:table-cell>
          <table:table-cell office:value-type="float" office:value="29.933" table:style-name="ce2">
            <text:p>29.933</text:p>
          </table:table-cell>
          <table:table-cell office:value-type="string" table:style-name="ce2">
            <text:p>High</text:p>
          </table:table-cell>
          <table:table-cell office:value-type="float" office:value="33.324190026113897" table:style-name="ce2">
            <text:p>33.3241900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oke-on-Trent</text:p>
          </table:table-cell>
          <table:table-cell office:value-type="float" office:value="172.2558702" table:style-name="ce2">
            <text:p>172.2558702</text:p>
          </table:table-cell>
          <table:table-cell office:value-type="float" office:value="91.415274659999994" table:style-name="ce2">
            <text:p>91.41527466</text:p>
          </table:table-cell>
          <table:table-cell office:value-type="float" office:value="29.977869999999999" table:style-name="ce2">
            <text:p>29.97787</text:p>
          </table:table-cell>
          <table:table-cell office:value-type="float" office:value="34.503999999999998" table:style-name="ce2">
            <text:p>34.504</text:p>
          </table:table-cell>
          <table:table-cell office:value-type="string" table:style-name="ce2">
            <text:p>High</text:p>
          </table:table-cell>
          <table:table-cell office:value-type="float" office:value="15.746817686130299" table:style-name="ce2">
            <text:p>15.7468176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ast Sussex</text:p>
          </table:table-cell>
          <table:table-cell office:value-type="float" office:value="459.89615839999999" table:style-name="ce2">
            <text:p>459.8961584</text:p>
          </table:table-cell>
          <table:table-cell office:value-type="float" office:value="106.1714573" table:style-name="ce2">
            <text:p>106.1714573</text:p>
          </table:table-cell>
          <table:table-cell office:value-type="float" office:value="30.063099999999999" table:style-name="ce2">
            <text:p>30.0631</text:p>
          </table:table-cell>
          <table:table-cell office:value-type="float" office:value="19.77" table:style-name="ce2">
            <text:p>19.77</text:p>
          </table:table-cell>
          <table:table-cell office:value-type="string" table:style-name="ce2">
            <text:p>Medium</text:p>
          </table:table-cell>
          <table:table-cell office:value-type="float" office:value="48.827845343999599" table:style-name="ce2">
            <text:p>48.827845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ighton and Hove</text:p>
          </table:table-cell>
          <table:table-cell office:value-type="float" office:value="442.72639420000002" table:style-name="ce2">
            <text:p>442.7263942</text:p>
          </table:table-cell>
          <table:table-cell office:value-type="float" office:value="128.5732653" table:style-name="ce2">
            <text:p>128.5732653</text:p>
          </table:table-cell>
          <table:table-cell office:value-type="float" office:value="30.21611" table:style-name="ce2">
            <text:p>30.21611</text:p>
          </table:table-cell>
          <table:table-cell office:value-type="float" office:value="20.760999999999999" table:style-name="ce2">
            <text:p>20.761</text:p>
          </table:table-cell>
          <table:table-cell office:value-type="string" table:style-name="ce2">
            <text:p>High</text:p>
          </table:table-cell>
          <table:table-cell office:value-type="float" office:value="56.922778136788999" table:style-name="ce2">
            <text:p>56.9227781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rbay</text:p>
          </table:table-cell>
          <table:table-cell office:value-type="float" office:value="602.2724978" table:style-name="ce2">
            <text:p>602.2724978</text:p>
          </table:table-cell>
          <table:table-cell office:value-type="float" office:value="140.63567320000001" table:style-name="ce2">
            <text:p>140.6356732</text:p>
          </table:table-cell>
          <table:table-cell office:value-type="float" office:value="30.27008" table:style-name="ce2">
            <text:p>30.27008</text:p>
          </table:table-cell>
          <table:table-cell office:value-type="float" office:value="28.103999999999999" table:style-name="ce2">
            <text:p>28.104</text:p>
          </table:table-cell>
          <table:table-cell office:value-type="string" table:style-name="ce2">
            <text:p>High</text:p>
          </table:table-cell>
          <table:table-cell office:value-type="float" office:value="84.700998177948506" table:style-name="ce2">
            <text:p>84.7009981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alton</text:p>
          </table:table-cell>
          <table:table-cell office:value-type="float" office:value="611.38592700000004" table:style-name="ce2">
            <text:p>611.385927</text:p>
          </table:table-cell>
          <table:table-cell office:value-type="float" office:value="127.12018310000001" table:style-name="ce2">
            <text:p>127.1201831</text:p>
          </table:table-cell>
          <table:table-cell office:value-type="float" office:value="30.424240000000001" table:style-name="ce2">
            <text:p>30.42424</text:p>
          </table:table-cell>
          <table:table-cell office:value-type="float" office:value="32.325000000000003" table:style-name="ce2">
            <text:p>32.325</text:p>
          </table:table-cell>
          <table:table-cell office:value-type="string" table:style-name="ce2">
            <text:p>High</text:p>
          </table:table-cell>
          <table:table-cell office:value-type="float" office:value="77.719490985003205" table:style-name="ce2">
            <text:p>77.719490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ochdale</text:p>
          </table:table-cell>
          <table:table-cell office:value-type="float" office:value="242.0233921" table:style-name="ce2">
            <text:p>242.0233921</text:p>
          </table:table-cell>
          <table:table-cell office:value-type="float" office:value="53.214133670000002" table:style-name="ce2">
            <text:p>53.21413367</text:p>
          </table:table-cell>
          <table:table-cell office:value-type="float" office:value="30.785689999999999" table:style-name="ce2">
            <text:p>30.78569</text:p>
          </table:table-cell>
          <table:table-cell office:value-type="float" office:value="34.414999999999999" table:style-name="ce2">
            <text:p>34.415</text:p>
          </table:table-cell>
          <table:table-cell office:value-type="string" table:style-name="ce2">
            <text:p>High</text:p>
          </table:table-cell>
          <table:table-cell office:value-type="float" office:value="12.8790651384762" table:style-name="ce2">
            <text:p>12.8790651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fton</text:p>
          </table:table-cell>
          <table:table-cell office:value-type="float" office:value="316.08262830000001" table:style-name="ce2">
            <text:p>316.0826283</text:p>
          </table:table-cell>
          <table:table-cell office:value-type="float" office:value="101.9084677" table:style-name="ce2">
            <text:p>101.9084677</text:p>
          </table:table-cell>
          <table:table-cell office:value-type="float" office:value="30.889050000000001" table:style-name="ce2">
            <text:p>30.88905</text:p>
          </table:table-cell>
          <table:table-cell office:value-type="float" office:value="27.035" table:style-name="ce2">
            <text:p>27.035</text:p>
          </table:table-cell>
          <table:table-cell office:value-type="string" table:style-name="ce2">
            <text:p>High</text:p>
          </table:table-cell>
          <table:table-cell office:value-type="float" office:value="32.2114963166417" table:style-name="ce2">
            <text:p>32.2114963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rth East Lincolnshire</text:p>
          </table:table-cell>
          <table:table-cell office:value-type="float" office:value="214.77386749999999" table:style-name="ce2">
            <text:p>214.7738675</text:p>
          </table:table-cell>
          <table:table-cell office:value-type="float" office:value="105.2410019" table:style-name="ce2">
            <text:p>105.2410019</text:p>
          </table:table-cell>
          <table:table-cell office:value-type="float" office:value="31.001470000000001" table:style-name="ce2">
            <text:p>31.00147</text:p>
          </table:table-cell>
          <table:table-cell office:value-type="float" office:value="31.335000000000001" table:style-name="ce2">
            <text:p>31.335</text:p>
          </table:table-cell>
          <table:table-cell office:value-type="string" table:style-name="ce2">
            <text:p>High</text:p>
          </table:table-cell>
          <table:table-cell office:value-type="float" office:value="22.603016997637798" table:style-name="ce2">
            <text:p>22.6030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nderland</text:p>
          </table:table-cell>
          <table:table-cell office:value-type="float" office:value="353.89077520000001" table:style-name="ce2">
            <text:p>353.8907752</text:p>
          </table:table-cell>
          <table:table-cell office:value-type="float" office:value="62.908907900000003" table:style-name="ce2">
            <text:p>62.9089079</text:p>
          </table:table-cell>
          <table:table-cell office:value-type="float" office:value="31.46895" table:style-name="ce2">
            <text:p>31.46895</text:p>
          </table:table-cell>
          <table:table-cell office:value-type="float" office:value="30.585999999999999" table:style-name="ce2">
            <text:p>30.586</text:p>
          </table:table-cell>
          <table:table-cell office:value-type="string" table:style-name="ce2">
            <text:p>High</text:p>
          </table:table-cell>
          <table:table-cell office:value-type="float" office:value="22.2628821837164" table:style-name="ce2">
            <text:p>22.2628821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rnwall</text:p>
          </table:table-cell>
          <table:table-cell office:value-type="float" office:value="250.41938870000001" table:style-name="ce2">
            <text:p>250.4193887</text:p>
          </table:table-cell>
          <table:table-cell office:value-type="float" office:value="202.73455920000001" table:style-name="ce2">
            <text:p>202.7345592</text:p>
          </table:table-cell>
          <table:table-cell office:value-type="float" office:value="31.734749999999998" table:style-name="ce2">
            <text:p>31.73475</text:p>
          </table:table-cell>
          <table:table-cell office:value-type="float" office:value="23.071999999999999" table:style-name="ce2">
            <text:p>23.072</text:p>
          </table:table-cell>
          <table:table-cell office:value-type="string" table:style-name="ce2">
            <text:p>High</text:p>
          </table:table-cell>
          <table:table-cell office:value-type="float" office:value="50.768664383228" table:style-name="ce2">
            <text:p>50.768664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istol</text:p>
          </table:table-cell>
          <table:table-cell office:value-type="float" office:value="482.8308735" table:style-name="ce2">
            <text:p>482.8308735</text:p>
          </table:table-cell>
          <table:table-cell office:value-type="float" office:value="131.25225589999999" table:style-name="ce2">
            <text:p>131.2522559</text:p>
          </table:table-cell>
          <table:table-cell office:value-type="float" office:value="32.277639999999998" table:style-name="ce2">
            <text:p>32.27764</text:p>
          </table:table-cell>
          <table:table-cell office:value-type="float" office:value="26.363" table:style-name="ce2">
            <text:p>26.363</text:p>
          </table:table-cell>
          <table:table-cell office:value-type="string" table:style-name="ce2">
            <text:p>High</text:p>
          </table:table-cell>
          <table:table-cell office:value-type="float" office:value="63.372641365042497" table:style-name="ce2">
            <text:p>63.3726413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lymouth</text:p>
          </table:table-cell>
          <table:table-cell office:value-type="float" office:value="282.33480450000002" table:style-name="ce2">
            <text:p>282.3348045</text:p>
          </table:table-cell>
          <table:table-cell office:value-type="float" office:value="125.3688738" table:style-name="ce2">
            <text:p>125.3688738</text:p>
          </table:table-cell>
          <table:table-cell office:value-type="float" office:value="32.66366" table:style-name="ce2">
            <text:p>32.66366</text:p>
          </table:table-cell>
          <table:table-cell office:value-type="float" office:value="26.619" table:style-name="ce2">
            <text:p>26.619</text:p>
          </table:table-cell>
          <table:table-cell office:value-type="string" table:style-name="ce2">
            <text:p>High</text:p>
          </table:table-cell>
          <table:table-cell office:value-type="float" office:value="35.395996474708198" table:style-name="ce2">
            <text:p>35.3959964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lackpool</text:p>
          </table:table-cell>
          <table:table-cell office:value-type="float" office:value="543.71297089999996" table:style-name="ce2">
            <text:p>543.7129709</text:p>
          </table:table-cell>
          <table:table-cell office:value-type="float" office:value="104.6645501" table:style-name="ce2">
            <text:p>104.6645501</text:p>
          </table:table-cell>
          <table:table-cell office:value-type="float" office:value="33.110329999999998" table:style-name="ce2">
            <text:p>33.11033</text:p>
          </table:table-cell>
          <table:table-cell office:value-type="float" office:value="45.039000000000001" table:style-name="ce2">
            <text:p>45.039</text:p>
          </table:table-cell>
          <table:table-cell office:value-type="string" table:style-name="ce2">
            <text:p>High</text:p>
          </table:table-cell>
          <table:table-cell office:value-type="float" office:value="56.907473482782898" table:style-name="ce2">
            <text:p>56.9074734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radford</text:p>
          </table:table-cell>
          <table:table-cell office:value-type="float" office:value="196.6904639" table:style-name="ce2">
            <text:p>196.6904639</text:p>
          </table:table-cell>
          <table:table-cell office:value-type="float" office:value="56.583488940000002" table:style-name="ce2">
            <text:p>56.58348894</text:p>
          </table:table-cell>
          <table:table-cell office:value-type="float" office:value="33.641680000000001" table:style-name="ce2">
            <text:p>33.64168</text:p>
          </table:table-cell>
          <table:table-cell office:value-type="float" office:value="34.665999999999997" table:style-name="ce2">
            <text:p>34.666</text:p>
          </table:table-cell>
          <table:table-cell office:value-type="string" table:style-name="ce2">
            <text:p>High</text:p>
          </table:table-cell>
          <table:table-cell office:value-type="float" office:value="11.1294326886891" table:style-name="ce2">
            <text:p>11.1294326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iddlesbrough</text:p>
          </table:table-cell>
          <table:table-cell office:value-type="float" office:value="407.27351420000002" table:style-name="ce2">
            <text:p>407.2735142</text:p>
          </table:table-cell>
          <table:table-cell office:value-type="float" office:value="86.229197209999995" table:style-name="ce2">
            <text:p>86.22919721</text:p>
          </table:table-cell>
          <table:table-cell office:value-type="float" office:value="33.858440000000002" table:style-name="ce2">
            <text:p>33.85844</text:p>
          </table:table-cell>
          <table:table-cell office:value-type="float" office:value="40.46" table:style-name="ce2">
            <text:p>40.46</text:p>
          </table:table-cell>
          <table:table-cell office:value-type="string" table:style-name="ce2">
            <text:p>High</text:p>
          </table:table-cell>
          <table:table-cell office:value-type="float" office:value="35.118868174361502" table:style-name="ce2">
            <text:p>35.118868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nowsley</text:p>
          </table:table-cell>
          <table:table-cell office:value-type="float" office:value="430.29293139999999" table:style-name="ce2">
            <text:p>430.2929314</text:p>
          </table:table-cell>
          <table:table-cell office:value-type="float" office:value="56.735979120000003" table:style-name="ce2">
            <text:p>56.73597912</text:p>
          </table:table-cell>
          <table:table-cell office:value-type="float" office:value="35.909170000000003" table:style-name="ce2">
            <text:p>35.90917</text:p>
          </table:table-cell>
          <table:table-cell office:value-type="float" office:value="43.006" table:style-name="ce2">
            <text:p>43.006</text:p>
          </table:table-cell>
          <table:table-cell office:value-type="string" table:style-name="ce2">
            <text:p>High</text:p>
          </table:table-cell>
          <table:table-cell office:value-type="float" office:value="24.413090771394" table:style-name="ce2">
            <text:p>24.41309077</text:p>
          </table:table-cell>
          <table:table-cell table:number-columns-repeated="16377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Office</meta:initial-creator>
    <dc:creator>Office</dc:creator>
    <meta:creation-date>2026-05-02T15:38:31Z</meta:creation-date>
    <dc:date>2026-05-02T15:39:27Z</dc:date>
  </office:meta>
</office:document-meta>
</file>